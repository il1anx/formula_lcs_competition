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808080"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CV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OCV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1899733543396" calcext:value-type="float">
            <text:p>4.1899733543396</text:p>
          </table:table-cell>
          <table:table-cell office:value-type="float" office:value="4.19153022766113" calcext:value-type="float">
            <text:p>4.19153022766113</text:p>
          </table:table-cell>
          <table:table-cell office:value-type="float" office:value="4.1908655166626" calcext:value-type="float">
            <text:p>4.190865516662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4.09245538711548" calcext:value-type="float">
            <text:p>4.09245538711548</text:p>
          </table:table-cell>
          <table:table-cell office:value-type="float" office:value="4.09326219558716" calcext:value-type="float">
            <text:p>4.09326219558716</text:p>
          </table:table-cell>
          <table:table-cell office:value-type="float" office:value="4.09230852127075" calcext:value-type="float">
            <text:p>4.0923085212707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4.04466485977173" calcext:value-type="float">
            <text:p>4.04466485977173</text:p>
          </table:table-cell>
          <table:table-cell office:value-type="float" office:value="4.04607534408569" calcext:value-type="float">
            <text:p>4.04607534408569</text:p>
          </table:table-cell>
          <table:table-cell office:value-type="float" office:value="4.04864549636841" calcext:value-type="float">
            <text:p>4.0486454963684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3.93737483024597" calcext:value-type="float">
            <text:p>3.93737483024597</text:p>
          </table:table-cell>
          <table:table-cell office:value-type="float" office:value="3.93875551223755" calcext:value-type="float">
            <text:p>3.93875551223755</text:p>
          </table:table-cell>
          <table:table-cell office:value-type="float" office:value="3.9411768913269" calcext:value-type="float">
            <text:p>3.941176891326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3.83577251434326" calcext:value-type="float">
            <text:p>3.83577251434326</text:p>
          </table:table-cell>
          <table:table-cell office:value-type="float" office:value="3.83869075775147" calcext:value-type="float">
            <text:p>3.83869075775147</text:p>
          </table:table-cell>
          <table:table-cell office:value-type="float" office:value="3.84473943710327" calcext:value-type="float">
            <text:p>3.8447394371032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3.75628757476807" calcext:value-type="float">
            <text:p>3.75628757476807</text:p>
          </table:table-cell>
          <table:table-cell office:value-type="float" office:value="3.75923085212708" calcext:value-type="float">
            <text:p>3.75923085212708</text:p>
          </table:table-cell>
          <table:table-cell office:value-type="float" office:value="3.7643346786499" calcext:value-type="float">
            <text:p>3.764334678649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3.66292858123779" calcext:value-type="float">
            <text:p>3.66292858123779</text:p>
          </table:table-cell>
          <table:table-cell office:value-type="float" office:value="3.65240955352783" calcext:value-type="float">
            <text:p>3.65240955352783</text:p>
          </table:table-cell>
          <table:table-cell office:value-type="float" office:value="3.64451742172241" calcext:value-type="float">
            <text:p>3.6445174217224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3.53464698791504" calcext:value-type="float">
            <text:p>3.53464698791504</text:p>
          </table:table-cell>
          <table:table-cell office:value-type="float" office:value="3.5323486328125" calcext:value-type="float">
            <text:p>3.5323486328125</text:p>
          </table:table-cell>
          <table:table-cell office:value-type="float" office:value="3.529953956604" calcext:value-type="float">
            <text:p>3.52995395660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3.44169187545776" calcext:value-type="float">
            <text:p>3.44169187545776</text:p>
          </table:table-cell>
          <table:table-cell office:value-type="float" office:value="3.44081568717957" calcext:value-type="float">
            <text:p>3.44081568717957</text:p>
          </table:table-cell>
          <table:table-cell office:value-type="float" office:value="3.43093800544739" calcext:value-type="float">
            <text:p>3.4309380054473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3.23304915428162" calcext:value-type="float">
            <text:p>3.23304915428162</text:p>
          </table:table-cell>
          <table:table-cell office:value-type="float" office:value="3.22783327102661" calcext:value-type="float">
            <text:p>3.22783327102661</text:p>
          </table:table-cell>
          <table:table-cell office:value-type="float" office:value="3.2243959903717" calcext:value-type="float">
            <text:p>3.2243959903717</text:p>
          </table:table-cell>
        </table:table-row>
      </table:table>
      <table:table table:name="R_0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-9.61827180324457" calcext:value-type="float" table:number-columns-spanned="4" table:number-rows-spanned="1">
            <text:p>-9.61827180324457</text:p>
          </table:table-cell>
          <table:covered-table-cell table:number-columns-repeated="3"/>
          <table:table-cell/>
          <table:table-cell table:style-name="ce1" office:value-type="float" office:value="-4.8094724997496" calcext:value-type="float" table:number-columns-spanned="4" table:number-rows-spanned="1">
            <text:p>-4.8094724997496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08969457515545" calcext:value-type="float">
            <text:p>0.0208969457515545</text:p>
          </table:table-cell>
          <table:table-cell office:value-type="float" office:value="0.016375134849274" calcext:value-type="float">
            <text:p>0.016375134849274</text:p>
          </table:table-cell>
          <table:table-cell office:value-type="float" office:value="0.0143655689080314" calcext:value-type="float">
            <text:p>0.01436556890803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977468803507" calcext:value-type="float">
            <text:p>0.0223977468803507</text:p>
          </table:table-cell>
          <table:table-cell office:value-type="float" office:value="0.016838892362239" calcext:value-type="float">
            <text:p>0.016838892362239</text:p>
          </table:table-cell>
          <table:table-cell office:value-type="float" office:value="0.0145216387506235" calcext:value-type="float">
            <text:p>0.014521638750623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85429568837496" calcext:value-type="float">
            <text:p>0.0185429568837496</text:p>
          </table:table-cell>
          <table:table-cell office:value-type="float" office:value="0.0148030322913059" calcext:value-type="float">
            <text:p>0.0148030322913059</text:p>
          </table:table-cell>
          <table:table-cell office:value-type="float" office:value="0.0133457294428562" calcext:value-type="float">
            <text:p>0.013345729442856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92561093239405" calcext:value-type="float">
            <text:p>0.0192561093239405</text:p>
          </table:table-cell>
          <table:table-cell office:value-type="float" office:value="0.0150452279742284" calcext:value-type="float">
            <text:p>0.0150452279742284</text:p>
          </table:table-cell>
          <table:table-cell office:value-type="float" office:value="0.0134470763585342" calcext:value-type="float">
            <text:p>0.013447076358534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75689631975861" calcext:value-type="float">
            <text:p>0.0175689631975861</text:p>
          </table:table-cell>
          <table:table-cell office:value-type="float" office:value="0.014244238055347" calcext:value-type="float">
            <text:p>0.014244238055347</text:p>
          </table:table-cell>
          <table:table-cell office:value-type="float" office:value="0.0129696195510676" calcext:value-type="float">
            <text:p>0.012969619551067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81700779776692" calcext:value-type="float">
            <text:p>0.0181700779776692</text:p>
          </table:table-cell>
          <table:table-cell office:value-type="float" office:value="0.0144124859184527" calcext:value-type="float">
            <text:p>0.0144124859184527</text:p>
          </table:table-cell>
          <table:table-cell office:value-type="float" office:value="0.0130677705542268" calcext:value-type="float">
            <text:p>0.013067770554226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71342767590725" calcext:value-type="float">
            <text:p>0.0171342767590725</text:p>
          </table:table-cell>
          <table:table-cell office:value-type="float" office:value="0.0139370990131393" calcext:value-type="float">
            <text:p>0.0139370990131393</text:p>
          </table:table-cell>
          <table:table-cell office:value-type="float" office:value="0.0127699129139726" calcext:value-type="float">
            <text:p>0.01276991291397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7576759274244" calcext:value-type="float">
            <text:p>0.017576759274244</text:p>
          </table:table-cell>
          <table:table-cell office:value-type="float" office:value="0.0140465382415619" calcext:value-type="float">
            <text:p>0.0140465382415619</text:p>
          </table:table-cell>
          <table:table-cell office:value-type="float" office:value="0.0128148983747903" calcext:value-type="float">
            <text:p>0.012814898374790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70817865790692" calcext:value-type="float">
            <text:p>0.0170817865790692</text:p>
          </table:table-cell>
          <table:table-cell office:value-type="float" office:value="0.0138742447759964" calcext:value-type="float">
            <text:p>0.0138742447759964</text:p>
          </table:table-cell>
          <table:table-cell office:value-type="float" office:value="0.0127151882120239" calcext:value-type="float">
            <text:p>0.012715188212023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73983350854821" calcext:value-type="float">
            <text:p>0.0173983350854821</text:p>
          </table:table-cell>
          <table:table-cell office:value-type="float" office:value="0.0139281588595513" calcext:value-type="float">
            <text:p>0.0139281588595513</text:p>
          </table:table-cell>
          <table:table-cell office:value-type="float" office:value="0.0126999024124993" calcext:value-type="float">
            <text:p>0.012699902412499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70273088031529" calcext:value-type="float">
            <text:p>0.0170273088031529</text:p>
          </table:table-cell>
          <table:table-cell office:value-type="float" office:value="0.0138774461382894" calcext:value-type="float">
            <text:p>0.0138774461382894</text:p>
          </table:table-cell>
          <table:table-cell office:value-type="float" office:value="0.012722766072234" calcext:value-type="float">
            <text:p>0.0127227660722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74117696520015" calcext:value-type="float">
            <text:p>0.0174117696520015</text:p>
          </table:table-cell>
          <table:table-cell office:value-type="float" office:value="0.0139027427376644" calcext:value-type="float">
            <text:p>0.0139027427376644</text:p>
          </table:table-cell>
          <table:table-cell office:value-type="float" office:value="0.0127036172567835" calcext:value-type="float">
            <text:p>0.012703617256783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171672542375037" calcext:value-type="float">
            <text:p>0.0171672542375037</text:p>
          </table:table-cell>
          <table:table-cell office:value-type="float" office:value="0.0139075954925356" calcext:value-type="float">
            <text:p>0.0139075954925356</text:p>
          </table:table-cell>
          <table:table-cell office:value-type="float" office:value="0.0127425113124588" calcext:value-type="float">
            <text:p>0.012742511312458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7495915689451" calcext:value-type="float">
            <text:p>0.017495915689451</text:p>
          </table:table-cell>
          <table:table-cell office:value-type="float" office:value="0.0139328084610531" calcext:value-type="float">
            <text:p>0.0139328084610531</text:p>
          </table:table-cell>
          <table:table-cell office:value-type="float" office:value="0.0127328717553446" calcext:value-type="float">
            <text:p>0.012732871755344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71672542375037" calcext:value-type="float">
            <text:p>0.0171672542375037</text:p>
          </table:table-cell>
          <table:table-cell office:value-type="float" office:value="0.0140718169046758" calcext:value-type="float">
            <text:p>0.0140718169046758</text:p>
          </table:table-cell>
          <table:table-cell office:value-type="float" office:value="0.0128371552499186" calcext:value-type="float">
            <text:p>0.012837155249918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17741061324451" calcext:value-type="float">
            <text:p>0.017741061324451</text:p>
          </table:table-cell>
          <table:table-cell office:value-type="float" office:value="0.0140816570296377" calcext:value-type="float">
            <text:p>0.0140816570296377</text:p>
          </table:table-cell>
          <table:table-cell office:value-type="float" office:value="0.0128107916443252" calcext:value-type="float">
            <text:p>0.012810791644325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171672542375037" calcext:value-type="float">
            <text:p>0.0171672542375037</text:p>
          </table:table-cell>
          <table:table-cell office:value-type="float" office:value="0.0140718169046758" calcext:value-type="float">
            <text:p>0.0140718169046758</text:p>
          </table:table-cell>
          <table:table-cell office:value-type="float" office:value="0.0130748389191311" calcext:value-type="float">
            <text:p>0.013074838919131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186485051759371" calcext:value-type="float">
            <text:p>0.0186485051759371</text:p>
          </table:table-cell>
          <table:table-cell office:value-type="float" office:value="0.0145628596541215" calcext:value-type="float">
            <text:p>0.0145628596541215</text:p>
          </table:table-cell>
          <table:table-cell office:value-type="float" office:value="0.0131412786384986" calcext:value-type="float">
            <text:p>0.013141278638498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71672542375037" calcext:value-type="float">
            <text:p>0.0171672542375037</text:p>
          </table:table-cell>
          <table:table-cell office:value-type="float" office:value="0.0140718169046758" calcext:value-type="float">
            <text:p>0.0140718169046758</text:p>
          </table:table-cell>
          <table:table-cell office:value-type="float" office:value="0.0130748389191311" calcext:value-type="float">
            <text:p>0.013074838919131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86485051759371" calcext:value-type="float">
            <text:p>0.0186485051759371</text:p>
          </table:table-cell>
          <table:table-cell office:value-type="float" office:value="0.0157854264637026" calcext:value-type="float">
            <text:p>0.0157854264637026</text:p>
          </table:table-cell>
          <table:table-cell office:value-type="float" office:value="0.013868894910505" calcext:value-type="float">
            <text:p>0.013868894910505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-0.960873090303861" calcext:value-type="float" table:number-columns-spanned="4" table:number-rows-spanned="1">
            <text:p>-0.960873090303861</text:p>
          </table:table-cell>
          <table:covered-table-cell table:number-columns-repeated="3"/>
          <table:table-cell/>
          <table:table-cell table:style-name="ce1" office:value-type="float" office:value="-0.320581778501853" calcext:value-type="float" table:number-columns-spanned="4" table:number-rows-spanned="1">
            <text:p>-0.320581778501853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35781019610261" calcext:value-type="float">
            <text:p>0.0235781019610261</text:p>
          </table:table-cell>
          <table:table-cell office:value-type="float" office:value="0.0173346905030945" calcext:value-type="float">
            <text:p>0.0173346905030945</text:p>
          </table:table-cell>
          <table:table-cell office:value-type="float" office:value="0.0148705562433675" calcext:value-type="float">
            <text:p>0.0148705562433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6442754506806" calcext:value-type="float">
            <text:p>0.0246442754506806</text:p>
          </table:table-cell>
          <table:table-cell office:value-type="float" office:value="0.0183372128982649" calcext:value-type="float">
            <text:p>0.0183372128982649</text:p>
          </table:table-cell>
          <table:table-cell office:value-type="float" office:value="0.0155340247452693" calcext:value-type="float">
            <text:p>0.015534024745269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96857777097367" calcext:value-type="float">
            <text:p>0.0196857777097367</text:p>
          </table:table-cell>
          <table:table-cell office:value-type="float" office:value="0.0151268573513354" calcext:value-type="float">
            <text:p>0.0151268573513354</text:p>
          </table:table-cell>
          <table:table-cell office:value-type="float" office:value="0.0134984179313018" calcext:value-type="float">
            <text:p>0.013498417931301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97474595379293" calcext:value-type="float">
            <text:p>0.0197474595379293</text:p>
          </table:table-cell>
          <table:table-cell office:value-type="float" office:value="0.0151154602978625" calcext:value-type="float">
            <text:p>0.0151154602978625</text:p>
          </table:table-cell>
          <table:table-cell office:value-type="float" office:value="0.0134413587401672" calcext:value-type="float">
            <text:p>0.013441358740167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84860233386763" calcext:value-type="float">
            <text:p>0.0184860233386763</text:p>
          </table:table-cell>
          <table:table-cell office:value-type="float" office:value="0.0144851969150989" calcext:value-type="float">
            <text:p>0.0144851969150989</text:p>
          </table:table-cell>
          <table:table-cell office:value-type="float" office:value="0.0131082225464489" calcext:value-type="float">
            <text:p>0.013108222546448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83374118574875" calcext:value-type="float">
            <text:p>0.0183374118574875</text:p>
          </table:table-cell>
          <table:table-cell office:value-type="float" office:value="0.0145225248902356" calcext:value-type="float">
            <text:p>0.0145225248902356</text:p>
          </table:table-cell>
          <table:table-cell office:value-type="float" office:value="0.0130828325119347" calcext:value-type="float">
            <text:p>0.013082832511934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77959603366917" calcext:value-type="float">
            <text:p>0.0177959603366917</text:p>
          </table:table-cell>
          <table:table-cell office:value-type="float" office:value="0.0141172832970184" calcext:value-type="float">
            <text:p>0.0141172832970184</text:p>
          </table:table-cell>
          <table:table-cell office:value-type="float" office:value="0.0128894594904751" calcext:value-type="float">
            <text:p>0.012889459490475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77337520090252" calcext:value-type="float">
            <text:p>0.0177337520090252</text:p>
          </table:table-cell>
          <table:table-cell office:value-type="float" office:value="0.0140909485418917" calcext:value-type="float">
            <text:p>0.0140909485418917</text:p>
          </table:table-cell>
          <table:table-cell office:value-type="float" office:value="0.0128435724979935" calcext:value-type="float">
            <text:p>0.012843572497993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75525262870582" calcext:value-type="float">
            <text:p>0.0175525262870582</text:p>
          </table:table-cell>
          <table:table-cell office:value-type="float" office:value="0.0139044596304346" calcext:value-type="float">
            <text:p>0.0139044596304346</text:p>
          </table:table-cell>
          <table:table-cell office:value-type="float" office:value="0.0127070850388396" calcext:value-type="float">
            <text:p>0.012707085038839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75833108212411" calcext:value-type="float">
            <text:p>0.0175833108212411</text:p>
          </table:table-cell>
          <table:table-cell office:value-type="float" office:value="0.0138327177533773" calcext:value-type="float">
            <text:p>0.0138327177533773</text:p>
          </table:table-cell>
          <table:table-cell office:value-type="float" office:value="0.0127389810938972" calcext:value-type="float">
            <text:p>0.012738981093897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75685448471578" calcext:value-type="float">
            <text:p>0.0175685448471578</text:p>
          </table:table-cell>
          <table:table-cell office:value-type="float" office:value="0.0139036185838405" calcext:value-type="float">
            <text:p>0.0139036185838405</text:p>
          </table:table-cell>
          <table:table-cell office:value-type="float" office:value="0.0127061718881569" calcext:value-type="float">
            <text:p>0.012706171888156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75271613187289" calcext:value-type="float">
            <text:p>0.0175271613187289</text:p>
          </table:table-cell>
          <table:table-cell office:value-type="float" office:value="0.0138790538558903" calcext:value-type="float">
            <text:p>0.0138790538558903</text:p>
          </table:table-cell>
          <table:table-cell office:value-type="float" office:value="0.0126708818487862" calcext:value-type="float">
            <text:p>0.0126708818487862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17591973414872" calcext:value-type="float">
            <text:p>0.017591973414872</text:p>
          </table:table-cell>
          <table:table-cell office:value-type="float" office:value="0.0139185877290097" calcext:value-type="float">
            <text:p>0.0139185877290097</text:p>
          </table:table-cell>
          <table:table-cell office:value-type="float" office:value="0.0127130968113931" calcext:value-type="float">
            <text:p>0.012713096811393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74864168184484" calcext:value-type="float">
            <text:p>0.0174864168184484</text:p>
          </table:table-cell>
          <table:table-cell office:value-type="float" office:value="0.0139332793888177" calcext:value-type="float">
            <text:p>0.0139332793888177</text:p>
          </table:table-cell>
          <table:table-cell office:value-type="float" office:value="0.0127456877906348" calcext:value-type="float">
            <text:p>0.012745687790634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78880498713393" calcext:value-type="float">
            <text:p>0.0178880498713393</text:p>
          </table:table-cell>
          <table:table-cell office:value-type="float" office:value="0.0140954894433781" calcext:value-type="float">
            <text:p>0.0140954894433781</text:p>
          </table:table-cell>
          <table:table-cell office:value-type="float" office:value="0.0128154860955142" calcext:value-type="float">
            <text:p>0.012815486095514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179466248858059" calcext:value-type="float">
            <text:p>0.0179466248858059</text:p>
          </table:table-cell>
          <table:table-cell office:value-type="float" office:value="0.0140124160037074" calcext:value-type="float">
            <text:p>0.0140124160037074</text:p>
          </table:table-cell>
          <table:table-cell office:value-type="float" office:value="0.0128035979400575" calcext:value-type="float">
            <text:p>0.012803597940057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187796463236645" calcext:value-type="float">
            <text:p>0.0187796463236645</text:p>
          </table:table-cell>
          <table:table-cell office:value-type="float" office:value="0.0145442950262368" calcext:value-type="float">
            <text:p>0.0145442950262368</text:p>
          </table:table-cell>
          <table:table-cell office:value-type="float" office:value="0.0131027489213916" calcext:value-type="float">
            <text:p>0.013102748921391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187984050043328" calcext:value-type="float">
            <text:p>0.0187984050043328</text:p>
          </table:table-cell>
          <table:table-cell office:value-type="float" office:value="0.0145233840715069" calcext:value-type="float">
            <text:p>0.0145233840715069</text:p>
          </table:table-cell>
          <table:table-cell office:value-type="float" office:value="0.0131690948255895" calcext:value-type="float">
            <text:p>0.01316909482558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209952384417786" calcext:value-type="float">
            <text:p>0.0209952384417786</text:p>
          </table:table-cell>
          <table:table-cell office:value-type="float" office:value="0.015744162170302" calcext:value-type="float">
            <text:p>0.015744162170302</text:p>
          </table:table-cell>
          <table:table-cell office:value-type="float" office:value="0.013888427958746" calcext:value-type="float">
            <text:p>0.01388842795874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09514357651493" calcext:value-type="float">
            <text:p>0.0209514357651493</text:p>
          </table:table-cell>
          <table:table-cell office:value-type="float" office:value="0.0157057873657242" calcext:value-type="float">
            <text:p>0.0157057873657242</text:p>
          </table:table-cell>
          <table:table-cell office:value-type="float" office:value="0.0137995389122503" calcext:value-type="float">
            <text:p>0.013799538912250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0.322026228293394" calcext:value-type="float" table:number-columns-spanned="4" table:number-rows-spanned="1">
            <text:p>0.322026228293394</text:p>
          </table:table-cell>
          <table:covered-table-cell table:number-columns-repeated="3"/>
          <table:table-cell/>
          <table:table-cell table:style-name="ce1" office:value-type="float" office:value="0.963226465078501" calcext:value-type="float" table:number-columns-spanned="4" table:number-rows-spanned="1">
            <text:p>0.963226465078501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07996814653454" calcext:value-type="float">
            <text:p>0.0207996814653454</text:p>
          </table:table-cell>
          <table:table-cell office:value-type="float" office:value="0.0151875588315671" calcext:value-type="float">
            <text:p>0.0151875588315671</text:p>
          </table:table-cell>
          <table:table-cell office:value-type="float" office:value="0.0135027295473501" calcext:value-type="float">
            <text:p>0.0135027295473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7077101487523" calcext:value-type="float">
            <text:p>0.0197077101487523</text:p>
          </table:table-cell>
          <table:table-cell office:value-type="float" office:value="0.0150914254965963" calcext:value-type="float">
            <text:p>0.0150914254965963</text:p>
          </table:table-cell>
          <table:table-cell office:value-type="float" office:value="0.0134765545633711" calcext:value-type="float">
            <text:p>0.013476554563371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207996814653454" calcext:value-type="float">
            <text:p>0.0207996814653454</text:p>
          </table:table-cell>
          <table:table-cell office:value-type="float" office:value="0.0145120772030942" calcext:value-type="float">
            <text:p>0.0145120772030942</text:p>
          </table:table-cell>
          <table:table-cell office:value-type="float" office:value="0.0131055874729039" calcext:value-type="float">
            <text:p>0.013105587472903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83051399283096" calcext:value-type="float">
            <text:p>0.0183051399283096</text:p>
          </table:table-cell>
          <table:table-cell office:value-type="float" office:value="0.0144570642924277" calcext:value-type="float">
            <text:p>0.0144570642924277</text:p>
          </table:table-cell>
          <table:table-cell office:value-type="float" office:value="0.0130817311109532" calcext:value-type="float">
            <text:p>0.013081731110953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41358332322712" calcext:value-type="float">
            <text:p>0.0141358332322712</text:p>
          </table:table-cell>
          <table:table-cell office:value-type="float" office:value="0.0129635571723677" calcext:value-type="float">
            <text:p>0.012963557172367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7836144026278" calcext:value-type="float">
            <text:p>0.017836144026278</text:p>
          </table:table-cell>
          <table:table-cell office:value-type="float" office:value="0.0141095850865661" calcext:value-type="float">
            <text:p>0.0141095850865661</text:p>
          </table:table-cell>
          <table:table-cell office:value-type="float" office:value="0.012866065855379" calcext:value-type="float">
            <text:p>0.01286606585537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922821969697" calcext:value-type="float">
            <text:p>0.013922821969697</text:p>
          </table:table-cell>
          <table:table-cell office:value-type="float" office:value="0.0127418225363232" calcext:value-type="float">
            <text:p>0.012741822536323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76340826717294" calcext:value-type="float">
            <text:p>0.0176340826717294</text:p>
          </table:table-cell>
          <table:table-cell office:value-type="float" office:value="0.0139102322410615" calcext:value-type="float">
            <text:p>0.0139102322410615</text:p>
          </table:table-cell>
          <table:table-cell office:value-type="float" office:value="0.0126890655778486" calcext:value-type="float">
            <text:p>0.012689065577848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9561078271969" calcext:value-type="float">
            <text:p>0.0139561078271969</text:p>
          </table:table-cell>
          <table:table-cell office:value-type="float" office:value="0.0127177145284622" calcext:value-type="float">
            <text:p>0.012717714528462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75392137828468" calcext:value-type="float">
            <text:p>0.0175392137828468</text:p>
          </table:table-cell>
          <table:table-cell office:value-type="float" office:value="0.0139204473350254" calcext:value-type="float">
            <text:p>0.0139204473350254</text:p>
          </table:table-cell>
          <table:table-cell office:value-type="float" office:value="0.0126837890248481" calcext:value-type="float">
            <text:p>0.012683789024848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9260012753166" calcext:value-type="float">
            <text:p>0.0139260012753166</text:p>
          </table:table-cell>
          <table:table-cell office:value-type="float" office:value="0.0127144886363636" calcext:value-type="float">
            <text:p>0.012714488636363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7653585295909" calcext:value-type="float">
            <text:p>0.017653585295909</text:p>
          </table:table-cell>
          <table:table-cell office:value-type="float" office:value="0.0139519835065258" calcext:value-type="float">
            <text:p>0.0139519835065258</text:p>
          </table:table-cell>
          <table:table-cell office:value-type="float" office:value="0.0127056039972195" calcext:value-type="float">
            <text:p>0.012705603997219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40997661213288" calcext:value-type="float">
            <text:p>0.0140997661213288</text:p>
          </table:table-cell>
          <table:table-cell office:value-type="float" office:value="0.0128009420795534" calcext:value-type="float">
            <text:p>0.012800942079553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7997224788924" calcext:value-type="float">
            <text:p>0.017997224788924</text:p>
          </table:table-cell>
          <table:table-cell office:value-type="float" office:value="0.0140980950012182" calcext:value-type="float">
            <text:p>0.0140980950012182</text:p>
          </table:table-cell>
          <table:table-cell office:value-type="float" office:value="0.0128159916378287" calcext:value-type="float">
            <text:p>0.012815991637828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46115428038856" calcext:value-type="float">
            <text:p>0.0146115428038856</text:p>
          </table:table-cell>
          <table:table-cell office:value-type="float" office:value="0.013179496274602" calcext:value-type="float">
            <text:p>0.0131794962746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189836463418347" calcext:value-type="float">
            <text:p>0.0189836463418347</text:p>
          </table:table-cell>
          <table:table-cell office:value-type="float" office:value="0.0146462865031111" calcext:value-type="float">
            <text:p>0.0146462865031111</text:p>
          </table:table-cell>
          <table:table-cell office:value-type="float" office:value="0.0132063704795588" calcext:value-type="float">
            <text:p>0.013206370479558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5835428135948" calcext:value-type="float">
            <text:p>0.015835428135948</text:p>
          </table:table-cell>
          <table:table-cell office:value-type="float" office:value="0.0139089691213922" calcext:value-type="float">
            <text:p>0.013908969121392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212501110490647" calcext:value-type="float">
            <text:p>0.0212501110490647</text:p>
          </table:table-cell>
          <table:table-cell office:value-type="float" office:value="0.0159289340101523" calcext:value-type="float">
            <text:p>0.0159289340101523</text:p>
          </table:table-cell>
          <table:table-cell office:value-type="float" office:value="0.0139864086732856" calcext:value-type="float">
            <text:p>0.013986408673285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5835428135948" calcext:value-type="float">
            <text:p>0.015835428135948</text:p>
          </table:table-cell>
          <table:table-cell office:value-type="float" office:value="0.0139089691213922" calcext:value-type="float">
            <text:p>0.013908969121392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12501110490647" calcext:value-type="float">
            <text:p>0.0212501110490647</text:p>
          </table:table-cell>
          <table:table-cell office:value-type="float" office:value="0.0159289340101523" calcext:value-type="float">
            <text:p>0.0159289340101523</text:p>
          </table:table-cell>
          <table:table-cell office:value-type="float" office:value="0.0139864086732856" calcext:value-type="float">
            <text:p>0.013986408673285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1.60351533156175" calcext:value-type="float" table:number-columns-spanned="4" table:number-rows-spanned="1">
            <text:p>1.60351533156175</text:p>
          </table:table-cell>
          <table:covered-table-cell table:number-columns-repeated="3"/>
          <table:table-cell/>
          <table:table-cell table:style-name="ce1" office:value-type="float" office:value="1.92406091934595" calcext:value-type="float" table:number-columns-spanned="4" table:number-rows-spanned="1">
            <text:p>1.92406091934595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73312985677282" calcext:value-type="float">
            <text:p>0.0173312985677282</text:p>
          </table:table-cell>
          <table:table-cell office:value-type="float" office:value="0.014175165428682" calcext:value-type="float">
            <text:p>0.014175165428682</text:p>
          </table:table-cell>
          <table:table-cell office:value-type="float" office:value="0.0132426180007739" calcext:value-type="float">
            <text:p>0.0132426180007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7975218155406" calcext:value-type="float">
            <text:p>0.0167975218155406</text:p>
          </table:table-cell>
          <table:table-cell office:value-type="float" office:value="0.0136741568967094" calcext:value-type="float">
            <text:p>0.0136741568967094</text:p>
          </table:table-cell>
          <table:table-cell office:value-type="float" office:value="0.0127716704834832" calcext:value-type="float">
            <text:p>0.012771670483483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73448656090845" calcext:value-type="float">
            <text:p>0.0173448656090845</text:p>
          </table:table-cell>
          <table:table-cell office:value-type="float" office:value="0.013864302515478" calcext:value-type="float">
            <text:p>0.013864302515478</text:p>
          </table:table-cell>
          <table:table-cell office:value-type="float" office:value="0.0129211080029375" calcext:value-type="float">
            <text:p>0.012921108002937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681675208509" calcext:value-type="float">
            <text:p>0.01681675208509</text:p>
          </table:table-cell>
          <table:table-cell office:value-type="float" office:value="0.0136783346457693" calcext:value-type="float">
            <text:p>0.0136783346457693</text:p>
          </table:table-cell>
          <table:table-cell office:value-type="float" office:value="0.0126083463093829" calcext:value-type="float">
            <text:p>0.01260834630938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73647187960853" calcext:value-type="float">
            <text:p>0.0173647187960853</text:p>
          </table:table-cell>
          <table:table-cell office:value-type="float" office:value="0.0138441908353463" calcext:value-type="float">
            <text:p>0.0138441908353463</text:p>
          </table:table-cell>
          <table:table-cell office:value-type="float" office:value="0.0126984713177917" calcext:value-type="float">
            <text:p>0.01269847131779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68879008518658" calcext:value-type="float">
            <text:p>0.0168879008518658</text:p>
          </table:table-cell>
          <table:table-cell office:value-type="float" office:value="0.013673224144674" calcext:value-type="float">
            <text:p>0.013673224144674</text:p>
          </table:table-cell>
          <table:table-cell office:value-type="float" office:value="0.0126274685879563" calcext:value-type="float">
            <text:p>0.012627468587956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74424050517235" calcext:value-type="float">
            <text:p>0.0174424050517235</text:p>
          </table:table-cell>
          <table:table-cell office:value-type="float" office:value="0.0138323153266255" calcext:value-type="float">
            <text:p>0.0138323153266255</text:p>
          </table:table-cell>
          <table:table-cell office:value-type="float" office:value="0.0126731865099549" calcext:value-type="float">
            <text:p>0.012673186509954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69607003979996" calcext:value-type="float">
            <text:p>0.0169607003979996</text:p>
          </table:table-cell>
          <table:table-cell office:value-type="float" office:value="0.0137556003413541" calcext:value-type="float">
            <text:p>0.0137556003413541</text:p>
          </table:table-cell>
          <table:table-cell office:value-type="float" office:value="0.0126276342723339" calcext:value-type="float">
            <text:p>0.012627634272333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78919143610977" calcext:value-type="float">
            <text:p>0.0178919143610977</text:p>
          </table:table-cell>
          <table:table-cell office:value-type="float" office:value="0.0138818808911609" calcext:value-type="float">
            <text:p>0.0138818808911609</text:p>
          </table:table-cell>
          <table:table-cell office:value-type="float" office:value="0.0126700754748595" calcext:value-type="float">
            <text:p>0.012670075474859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74778961924184" calcext:value-type="float">
            <text:p>0.0174778961924184</text:p>
          </table:table-cell>
          <table:table-cell office:value-type="float" office:value="0.0141001122055794" calcext:value-type="float">
            <text:p>0.0141001122055794</text:p>
          </table:table-cell>
          <table:table-cell office:value-type="float" office:value="0.0126578124920645" calcext:value-type="float">
            <text:p>0.012657812492064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91540488666829" calcext:value-type="float">
            <text:p>0.0191540488666829</text:p>
          </table:table-cell>
          <table:table-cell office:value-type="float" office:value="0.0141325249307606" calcext:value-type="float">
            <text:p>0.0141325249307606</text:p>
          </table:table-cell>
          <table:table-cell office:value-type="float" office:value="0.0127234271097018" calcext:value-type="float">
            <text:p>0.01272342710970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91110387046315" calcext:value-type="float">
            <text:p>0.0191110387046315</text:p>
          </table:table-cell>
          <table:table-cell office:value-type="float" office:value="0.0149947535685259" calcext:value-type="float">
            <text:p>0.0149947535685259</text:p>
          </table:table-cell>
          <table:table-cell office:value-type="float" office:value="0.0129561267632458" calcext:value-type="float">
            <text:p>0.012956126763245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217179691309118" calcext:value-type="float">
            <text:p>0.0217179691309118</text:p>
          </table:table-cell>
          <table:table-cell office:value-type="float" office:value="0.0148236752166705" calcext:value-type="float">
            <text:p>0.0148236752166705</text:p>
          </table:table-cell>
          <table:table-cell office:value-type="float" office:value="0.01287772057076" calcext:value-type="float">
            <text:p>0.0128777205707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219074690380843" calcext:value-type="float">
            <text:p>0.0219074690380843</text:p>
          </table:table-cell>
          <table:table-cell office:value-type="float" office:value="0.0168030161659942" calcext:value-type="float">
            <text:p>0.0168030161659942</text:p>
          </table:table-cell>
          <table:table-cell office:value-type="float" office:value="0.0135108439011387" calcext:value-type="float">
            <text:p>0.013510843901138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7179691309118" calcext:value-type="float">
            <text:p>0.0217179691309118</text:p>
          </table:table-cell>
          <table:table-cell office:value-type="float" office:value="0.016411922564801" calcext:value-type="float">
            <text:p>0.016411922564801</text:p>
          </table:table-cell>
          <table:table-cell office:value-type="float" office:value="0.0133219707581326" calcext:value-type="float">
            <text:p>0.01332197075813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219074690380843" calcext:value-type="float">
            <text:p>0.0219074690380843</text:p>
          </table:table-cell>
          <table:table-cell office:value-type="float" office:value="0.0168030161659942" calcext:value-type="float">
            <text:p>0.0168030161659942</text:p>
          </table:table-cell>
          <table:table-cell office:value-type="float" office:value="0.014773435734257" calcext:value-type="float">
            <text:p>0.01477343573425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217179691309118" calcext:value-type="float">
            <text:p>0.0217179691309118</text:p>
          </table:table-cell>
          <table:table-cell office:value-type="float" office:value="0.016411922564801" calcext:value-type="float">
            <text:p>0.016411922564801</text:p>
          </table:table-cell>
          <table:table-cell office:value-type="float" office:value="0.0143314705595707" calcext:value-type="float">
            <text:p>0.014331470559570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219074690380843" calcext:value-type="float">
            <text:p>0.0219074690380843</text:p>
          </table:table-cell>
          <table:table-cell office:value-type="float" office:value="0.0168030161659942" calcext:value-type="float">
            <text:p>0.0168030161659942</text:p>
          </table:table-cell>
          <table:table-cell office:value-type="float" office:value="0.014773435734257" calcext:value-type="float">
            <text:p>0.01477343573425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217179691309118" calcext:value-type="float">
            <text:p>0.0217179691309118</text:p>
          </table:table-cell>
          <table:table-cell office:value-type="float" office:value="0.016411922564801" calcext:value-type="float">
            <text:p>0.016411922564801</text:p>
          </table:table-cell>
          <table:table-cell office:value-type="float" office:value="0.0143314705595707" calcext:value-type="float">
            <text:p>0.01433147055957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19074690380843" calcext:value-type="float">
            <text:p>0.0219074690380843</text:p>
          </table:table-cell>
          <table:table-cell office:value-type="float" office:value="0.0168030161659942" calcext:value-type="float">
            <text:p>0.0168030161659942</text:p>
          </table:table-cell>
          <table:table-cell office:value-type="float" office:value="0.014773435734257" calcext:value-type="float">
            <text:p>0.014773435734257</text:p>
          </table:table-cell>
        </table:table-row>
      </table:table>
      <table:table table:name="R_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-9.61827180324457" calcext:value-type="float" table:number-columns-spanned="4" table:number-rows-spanned="1">
            <text:p>-9.61827180324457</text:p>
          </table:table-cell>
          <table:covered-table-cell table:number-columns-repeated="3"/>
          <table:table-cell/>
          <table:table-cell table:style-name="ce1" office:value-type="float" office:value="-4.8094724997496" calcext:value-type="float" table:number-columns-spanned="4" table:number-rows-spanned="1">
            <text:p>-4.8094724997496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588147412977802" calcext:value-type="float">
            <text:p>0.00588147412977802</text:p>
          </table:table-cell>
          <table:table-cell office:value-type="float" office:value="0.00675271639946551" calcext:value-type="float">
            <text:p>0.00675271639946551</text:p>
          </table:table-cell>
          <table:table-cell office:value-type="float" office:value="0.00659227972306084" calcext:value-type="float">
            <text:p>0.006592279723060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2639573164867" calcext:value-type="float">
            <text:p>0.0102639573164867</text:p>
          </table:table-cell>
          <table:table-cell office:value-type="float" office:value="0.00986863637270037" calcext:value-type="float">
            <text:p>0.00986863637270037</text:p>
          </table:table-cell>
          <table:table-cell office:value-type="float" office:value="0.00912676416017431" calcext:value-type="float">
            <text:p>0.0091267641601743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0771600435781647" calcext:value-type="float">
            <text:p>0.00771600435781647</text:p>
          </table:table-cell>
          <table:table-cell office:value-type="float" office:value="0.00844670653735221" calcext:value-type="float">
            <text:p>0.00844670653735221</text:p>
          </table:table-cell>
          <table:table-cell office:value-type="float" office:value="0.00777517089719098" calcext:value-type="float">
            <text:p>0.007775170897190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0958566696060849" calcext:value-type="float">
            <text:p>0.00958566696060849</text:p>
          </table:table-cell>
          <table:table-cell office:value-type="float" office:value="0.00848567662538143" calcext:value-type="float">
            <text:p>0.00848567662538143</text:p>
          </table:table-cell>
          <table:table-cell office:value-type="float" office:value="0.00696286240573036" calcext:value-type="float">
            <text:p>0.0069628624057303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982839045622961" calcext:value-type="float">
            <text:p>0.00982839045622961</text:p>
          </table:table-cell>
          <table:table-cell office:value-type="float" office:value="0.00988815160847021" calcext:value-type="float">
            <text:p>0.00988815160847021</text:p>
          </table:table-cell>
          <table:table-cell office:value-type="float" office:value="0.00916168262401082" calcext:value-type="float">
            <text:p>0.0091616826240108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34274828406036" calcext:value-type="float">
            <text:p>0.0134274828406036</text:p>
          </table:table-cell>
          <table:table-cell office:value-type="float" office:value="0.0119963346205773" calcext:value-type="float">
            <text:p>0.0119963346205773</text:p>
          </table:table-cell>
          <table:table-cell office:value-type="float" office:value="0.0102977048011881" calcext:value-type="float">
            <text:p>0.010297704801188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01584233330109" calcext:value-type="float">
            <text:p>0.0101584233330109</text:p>
          </table:table-cell>
          <table:table-cell office:value-type="float" office:value="0.00994305533616506" calcext:value-type="float">
            <text:p>0.00994305533616506</text:p>
          </table:table-cell>
          <table:table-cell office:value-type="float" office:value="0.0090932583049207" calcext:value-type="float">
            <text:p>0.009093258304920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21919644393604" calcext:value-type="float">
            <text:p>0.0121919644393604</text:p>
          </table:table-cell>
          <table:table-cell office:value-type="float" office:value="0.0107974658447741" calcext:value-type="float">
            <text:p>0.0107974658447741</text:p>
          </table:table-cell>
          <table:table-cell office:value-type="float" office:value="0.00919635274662712" calcext:value-type="float">
            <text:p>0.0091963527466271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19638079081804" calcext:value-type="float">
            <text:p>0.0119638079081804</text:p>
          </table:table-cell>
          <table:table-cell office:value-type="float" office:value="0.0115110358012954" calcext:value-type="float">
            <text:p>0.0115110358012954</text:p>
          </table:table-cell>
          <table:table-cell office:value-type="float" office:value="0.0109662634135486" calcext:value-type="float">
            <text:p>0.010966263413548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2574983051026" calcext:value-type="float">
            <text:p>0.012574983051026</text:p>
          </table:table-cell>
          <table:table-cell office:value-type="float" office:value="0.0116195010710329" calcext:value-type="float">
            <text:p>0.0116195010710329</text:p>
          </table:table-cell>
          <table:table-cell office:value-type="float" office:value="0.0102141213545697" calcext:value-type="float">
            <text:p>0.010214121354569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27715726618859" calcext:value-type="float">
            <text:p>0.0127715726618859</text:p>
          </table:table-cell>
          <table:table-cell office:value-type="float" office:value="0.011707491117447" calcext:value-type="float">
            <text:p>0.011707491117447</text:p>
          </table:table-cell>
          <table:table-cell office:value-type="float" office:value="0.0107852654316738" calcext:value-type="float">
            <text:p>0.010785265431673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39650502124618" calcext:value-type="float">
            <text:p>0.0139650502124618</text:p>
          </table:table-cell>
          <table:table-cell office:value-type="float" office:value="0.0130222466600467" calcext:value-type="float">
            <text:p>0.0130222466600467</text:p>
          </table:table-cell>
          <table:table-cell office:value-type="float" office:value="0.0119626314179404" calcext:value-type="float">
            <text:p>0.011962631417940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17971482863859" calcext:value-type="float">
            <text:p>0.017971482863859</text:p>
          </table:table-cell>
          <table:table-cell office:value-type="float" office:value="0.0130991082277302" calcext:value-type="float">
            <text:p>0.0130991082277302</text:p>
          </table:table-cell>
          <table:table-cell office:value-type="float" office:value="0.010862069104398" calcext:value-type="float">
            <text:p>0.01086206910439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34138732057371" calcext:value-type="float">
            <text:p>0.0134138732057371</text:p>
          </table:table-cell>
          <table:table-cell office:value-type="float" office:value="0.012077754176894" calcext:value-type="float">
            <text:p>0.012077754176894</text:p>
          </table:table-cell>
          <table:table-cell office:value-type="float" office:value="0.0107778047334625" calcext:value-type="float">
            <text:p>0.010777804733462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7971482863859" calcext:value-type="float">
            <text:p>0.017971482863859</text:p>
          </table:table-cell>
          <table:table-cell office:value-type="float" office:value="0.0204976331005528" calcext:value-type="float">
            <text:p>0.0204976331005528</text:p>
          </table:table-cell>
          <table:table-cell office:value-type="float" office:value="0.0136715597119813" calcext:value-type="float">
            <text:p>0.013671559711981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217425517438959" calcext:value-type="float">
            <text:p>0.0217425517438959</text:p>
          </table:table-cell>
          <table:table-cell office:value-type="float" office:value="0.0171190523265226" calcext:value-type="float">
            <text:p>0.0171190523265226</text:p>
          </table:table-cell>
          <table:table-cell office:value-type="float" office:value="0.013680896040741" calcext:value-type="float">
            <text:p>0.01368089604074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17971482863859" calcext:value-type="float">
            <text:p>0.017971482863859</text:p>
          </table:table-cell>
          <table:table-cell office:value-type="float" office:value="0.0204976331005528" calcext:value-type="float">
            <text:p>0.0204976331005528</text:p>
          </table:table-cell>
          <table:table-cell office:value-type="float" office:value="0.0260710399310775" calcext:value-type="float">
            <text:p>0.02607103993107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434178054727066" calcext:value-type="float">
            <text:p>0.0434178054727066</text:p>
          </table:table-cell>
          <table:table-cell office:value-type="float" office:value="0.0244118313220914" calcext:value-type="float">
            <text:p>0.0244118313220914</text:p>
          </table:table-cell>
          <table:table-cell office:value-type="float" office:value="0.0175873956759502" calcext:value-type="float">
            <text:p>0.017587395675950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7971482863859" calcext:value-type="float">
            <text:p>0.017971482863859</text:p>
          </table:table-cell>
          <table:table-cell office:value-type="float" office:value="0.0204976331005528" calcext:value-type="float">
            <text:p>0.0204976331005528</text:p>
          </table:table-cell>
          <table:table-cell office:value-type="float" office:value="0.0260710399310775" calcext:value-type="float">
            <text:p>0.02607103993107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434178054727066" calcext:value-type="float">
            <text:p>0.0434178054727066</text:p>
          </table:table-cell>
          <table:table-cell office:value-type="float" office:value="0.037863629881143" calcext:value-type="float">
            <text:p>0.037863629881143</text:p>
          </table:table-cell>
          <table:table-cell office:value-type="float" office:value="0.0245980383098257" calcext:value-type="float">
            <text:p>0.0245980383098257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-0.960873090303861" calcext:value-type="float" table:number-columns-spanned="4" table:number-rows-spanned="1">
            <text:p>-0.960873090303861</text:p>
          </table:table-cell>
          <table:covered-table-cell table:number-columns-repeated="3"/>
          <table:table-cell/>
          <table:table-cell table:style-name="ce1" office:value-type="float" office:value="-0.320581778501853" calcext:value-type="float" table:number-columns-spanned="4" table:number-rows-spanned="1">
            <text:p>-0.320581778501853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15184848783088" calcext:value-type="float">
            <text:p>0.0215184848783088</text:p>
          </table:table-cell>
          <table:table-cell office:value-type="float" office:value="0.0170740987724351" calcext:value-type="float">
            <text:p>0.0170740987724351</text:p>
          </table:table-cell>
          <table:table-cell office:value-type="float" office:value="0.0144305907620296" calcext:value-type="float">
            <text:p>0.0144305907620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8851733831933" calcext:value-type="float">
            <text:p>0.0248851733831933</text:p>
          </table:table-cell>
          <table:table-cell office:value-type="float" office:value="0.0197702140742291" calcext:value-type="float">
            <text:p>0.0197702140742291</text:p>
          </table:table-cell>
          <table:table-cell office:value-type="float" office:value="0.0167411776922126" calcext:value-type="float">
            <text:p>0.016741177692212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83923910278187" calcext:value-type="float">
            <text:p>0.0183923910278187</text:p>
          </table:table-cell>
          <table:table-cell office:value-type="float" office:value="0.0136990667619507" calcext:value-type="float">
            <text:p>0.0136990667619507</text:p>
          </table:table-cell>
          <table:table-cell office:value-type="float" office:value="0.00963593452127621" calcext:value-type="float">
            <text:p>0.0096359345212762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207841511557094" calcext:value-type="float">
            <text:p>0.0207841511557094</text:p>
          </table:table-cell>
          <table:table-cell office:value-type="float" office:value="0.0144116185181984" calcext:value-type="float">
            <text:p>0.0144116185181984</text:p>
          </table:table-cell>
          <table:table-cell office:value-type="float" office:value="0.00999667380425581" calcext:value-type="float">
            <text:p>0.0099966738042558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250351781309079" calcext:value-type="float">
            <text:p>0.0250351781309079</text:p>
          </table:table-cell>
          <table:table-cell office:value-type="float" office:value="0.0203323921306775" calcext:value-type="float">
            <text:p>0.0203323921306775</text:p>
          </table:table-cell>
          <table:table-cell office:value-type="float" office:value="0.0159213175984991" calcext:value-type="float">
            <text:p>0.015921317598499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300378353175187" calcext:value-type="float">
            <text:p>0.0300378353175187</text:p>
          </table:table-cell>
          <table:table-cell office:value-type="float" office:value="0.0222044657120929" calcext:value-type="float">
            <text:p>0.0222044657120929</text:p>
          </table:table-cell>
          <table:table-cell office:value-type="float" office:value="0.0162657013962451" calcext:value-type="float">
            <text:p>0.016265701396245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242940594144215" calcext:value-type="float">
            <text:p>0.0242940594144215</text:p>
          </table:table-cell>
          <table:table-cell office:value-type="float" office:value="0.020911864667035" calcext:value-type="float">
            <text:p>0.020911864667035</text:p>
          </table:table-cell>
          <table:table-cell office:value-type="float" office:value="0.0175291982490748" calcext:value-type="float">
            <text:p>0.017529198249074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33391493573513" calcext:value-type="float">
            <text:p>0.033391493573513</text:p>
          </table:table-cell>
          <table:table-cell office:value-type="float" office:value="0.0259842766925567" calcext:value-type="float">
            <text:p>0.0259842766925567</text:p>
          </table:table-cell>
          <table:table-cell office:value-type="float" office:value="0.020174222042422" calcext:value-type="float">
            <text:p>0.02017422204242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58147625807696" calcext:value-type="float">
            <text:p>0.0158147625807696</text:p>
          </table:table-cell>
          <table:table-cell office:value-type="float" office:value="0.0131024141512807" calcext:value-type="float">
            <text:p>0.0131024141512807</text:p>
          </table:table-cell>
          <table:table-cell office:value-type="float" office:value="0.0110124395314545" calcext:value-type="float">
            <text:p>0.011012439531454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70836078110103" calcext:value-type="float">
            <text:p>0.0170836078110103</text:p>
          </table:table-cell>
          <table:table-cell office:value-type="float" office:value="0.0137843989199457" calcext:value-type="float">
            <text:p>0.0137843989199457</text:p>
          </table:table-cell>
          <table:table-cell office:value-type="float" office:value="0.0116149612925061" calcext:value-type="float">
            <text:p>0.011614961292506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91247772781543" calcext:value-type="float">
            <text:p>0.0191247772781543</text:p>
          </table:table-cell>
          <table:table-cell office:value-type="float" office:value="0.0163327432065457" calcext:value-type="float">
            <text:p>0.0163327432065457</text:p>
          </table:table-cell>
          <table:table-cell office:value-type="float" office:value="0.014303919148238" calcext:value-type="float">
            <text:p>0.01430391914823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201199135069218" calcext:value-type="float">
            <text:p>0.0201199135069218</text:p>
          </table:table-cell>
          <table:table-cell office:value-type="float" office:value="0.0166623651363753" calcext:value-type="float">
            <text:p>0.0166623651363753</text:p>
          </table:table-cell>
          <table:table-cell office:value-type="float" office:value="0.0143195261592052" calcext:value-type="float">
            <text:p>0.0143195261592052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195295463260478" calcext:value-type="float">
            <text:p>0.0195295463260478</text:p>
          </table:table-cell>
          <table:table-cell office:value-type="float" office:value="0.0154905336807582" calcext:value-type="float">
            <text:p>0.0154905336807582</text:p>
          </table:table-cell>
          <table:table-cell office:value-type="float" office:value="0.0123312290724997" calcext:value-type="float">
            <text:p>0.012331229072499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206371148284127" calcext:value-type="float">
            <text:p>0.0206371148284127</text:p>
          </table:table-cell>
          <table:table-cell office:value-type="float" office:value="0.0175876801522339" calcext:value-type="float">
            <text:p>0.0175876801522339</text:p>
          </table:table-cell>
          <table:table-cell office:value-type="float" office:value="0.0150672271897213" calcext:value-type="float">
            <text:p>0.015067227189721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53707177627115" calcext:value-type="float">
            <text:p>0.0153707177627115</text:p>
          </table:table-cell>
          <table:table-cell office:value-type="float" office:value="0.0126982783221291" calcext:value-type="float">
            <text:p>0.0126982783221291</text:p>
          </table:table-cell>
          <table:table-cell office:value-type="float" office:value="0.0107725367483906" calcext:value-type="float">
            <text:p>0.010772536748390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19353693086831" calcext:value-type="float">
            <text:p>0.019353693086831</text:p>
          </table:table-cell>
          <table:table-cell office:value-type="float" office:value="0.0168136535538863" calcext:value-type="float">
            <text:p>0.0168136535538863</text:p>
          </table:table-cell>
          <table:table-cell office:value-type="float" office:value="0.0148098870664063" calcext:value-type="float">
            <text:p>0.014809887066406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511295288689729" calcext:value-type="float">
            <text:p>0.0511295288689729</text:p>
          </table:table-cell>
          <table:table-cell office:value-type="float" office:value="0.0417927372497635" calcext:value-type="float">
            <text:p>0.0417927372497635</text:p>
          </table:table-cell>
          <table:table-cell office:value-type="float" office:value="0.0369779367056412" calcext:value-type="float">
            <text:p>0.03697793670564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463135641879321" calcext:value-type="float">
            <text:p>0.0463135641879321</text:p>
          </table:table-cell>
          <table:table-cell office:value-type="float" office:value="0.038284582163463" calcext:value-type="float">
            <text:p>0.038284582163463</text:p>
          </table:table-cell>
          <table:table-cell office:value-type="float" office:value="0.0341633722357047" calcext:value-type="float">
            <text:p>0.034163372235704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1963129851428" calcext:value-type="float">
            <text:p>0.11963129851428</text:p>
          </table:table-cell>
          <table:table-cell office:value-type="float" office:value="0.0944803031834277" calcext:value-type="float">
            <text:p>0.0944803031834277</text:p>
          </table:table-cell>
          <table:table-cell office:value-type="float" office:value="0.0846365661929343" calcext:value-type="float">
            <text:p>0.084636566192934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94847712688643" calcext:value-type="float">
            <text:p>0.094847712688643</text:p>
          </table:table-cell>
          <table:table-cell office:value-type="float" office:value="0.0908603837464433" calcext:value-type="float">
            <text:p>0.0908603837464433</text:p>
          </table:table-cell>
          <table:table-cell office:value-type="float" office:value="0.0862713177190066" calcext:value-type="float">
            <text:p>0.086271317719006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0.322026228293394" calcext:value-type="float" table:number-columns-spanned="4" table:number-rows-spanned="1">
            <text:p>0.322026228293394</text:p>
          </table:table-cell>
          <table:covered-table-cell table:number-columns-repeated="3"/>
          <table:table-cell/>
          <table:table-cell table:style-name="ce1" office:value-type="float" office:value="0.963226465078501" calcext:value-type="float" table:number-columns-spanned="4" table:number-rows-spanned="1">
            <text:p>0.963226465078501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07996814653454" calcext:value-type="float">
            <text:p>0.0207996814653454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32948216388165" calcext:value-type="float">
            <text:p>0.0132948216388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2057977190401" calcext:value-type="float">
            <text:p>0.0132057977190401</text:p>
          </table:table-cell>
          <table:table-cell office:value-type="float" office:value="0.00938277845805918" calcext:value-type="float">
            <text:p>0.00938277845805918</text:p>
          </table:table-cell>
          <table:table-cell office:value-type="float" office:value="0.00693155638131778" calcext:value-type="float">
            <text:p>0.0069315563813177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207996814653454" calcext:value-type="float">
            <text:p>0.0207996814653454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32948216388165" calcext:value-type="float">
            <text:p>0.013294821638816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56490707143108" calcext:value-type="float">
            <text:p>0.0156490707143108</text:p>
          </table:table-cell>
          <table:table-cell office:value-type="float" office:value="0.0122314968566107" calcext:value-type="float">
            <text:p>0.0122314968566107</text:p>
          </table:table-cell>
          <table:table-cell office:value-type="float" office:value="0.00971933661620904" calcext:value-type="float">
            <text:p>0.00971933661620904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49410842576491" calcext:value-type="float">
            <text:p>0.014941084257649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78262558410046" calcext:value-type="float">
            <text:p>0.0178262558410046</text:p>
          </table:table-cell>
          <table:table-cell office:value-type="float" office:value="0.0135938888162443" calcext:value-type="float">
            <text:p>0.0135938888162443</text:p>
          </table:table-cell>
          <table:table-cell office:value-type="float" office:value="0.0109385133708481" calcext:value-type="float">
            <text:p>0.010938513370848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49410842576491" calcext:value-type="float">
            <text:p>0.014941084257649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39516187042768" calcext:value-type="float">
            <text:p>0.0139516187042768</text:p>
          </table:table-cell>
          <table:table-cell office:value-type="float" office:value="0.0106085347083951" calcext:value-type="float">
            <text:p>0.0106085347083951</text:p>
          </table:table-cell>
          <table:table-cell office:value-type="float" office:value="0.00847750902210259" calcext:value-type="float">
            <text:p>0.0084775090221025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49410842576491" calcext:value-type="float">
            <text:p>0.014941084257649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67853371590393" calcext:value-type="float">
            <text:p>0.0167853371590393</text:p>
          </table:table-cell>
          <table:table-cell office:value-type="float" office:value="0.0134728950804437" calcext:value-type="float">
            <text:p>0.0134728950804437</text:p>
          </table:table-cell>
          <table:table-cell office:value-type="float" office:value="0.0107105188807283" calcext:value-type="float">
            <text:p>0.010710518880728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50770393806212" calcext:value-type="float">
            <text:p>0.015077039380621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94991262247213" calcext:value-type="float">
            <text:p>0.0194991262247213</text:p>
          </table:table-cell>
          <table:table-cell office:value-type="float" office:value="0.0174238605970247" calcext:value-type="float">
            <text:p>0.0174238605970247</text:p>
          </table:table-cell>
          <table:table-cell office:value-type="float" office:value="0.0151914213162909" calcext:value-type="float">
            <text:p>0.015191421316290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133651748626512" calcext:value-type="float">
            <text:p>0.0133651748626512</text:p>
          </table:table-cell>
          <table:table-cell office:value-type="float" office:value="0.011909387273048" calcext:value-type="float">
            <text:p>0.01190938727304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38756790305067" calcext:value-type="float">
            <text:p>0.0138756790305067</text:p>
          </table:table-cell>
          <table:table-cell office:value-type="float" office:value="0.0109849250430613" calcext:value-type="float">
            <text:p>0.0109849250430613</text:p>
          </table:table-cell>
          <table:table-cell office:value-type="float" office:value="0.00920385021438224" calcext:value-type="float">
            <text:p>0.0092038502143822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747665970269624" calcext:value-type="float">
            <text:p>0.0747665970269624</text:p>
          </table:table-cell>
          <table:table-cell office:value-type="float" office:value="0.0322321993634374" calcext:value-type="float">
            <text:p>0.032232199363437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377636919354958" calcext:value-type="float">
            <text:p>0.0377636919354958</text:p>
          </table:table-cell>
          <table:table-cell office:value-type="float" office:value="0.0334727272756119" calcext:value-type="float">
            <text:p>0.0334727272756119</text:p>
          </table:table-cell>
          <table:table-cell office:value-type="float" office:value="0.0304373318921658" calcext:value-type="float">
            <text:p>0.030437331892165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747665970269624" calcext:value-type="float">
            <text:p>0.0747665970269624</text:p>
          </table:table-cell>
          <table:table-cell office:value-type="float" office:value="0.0322321993634374" calcext:value-type="float">
            <text:p>0.032232199363437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612629201714896" calcext:value-type="float">
            <text:p>0.0612629201714896</text:p>
          </table:table-cell>
          <table:table-cell office:value-type="float" office:value="0.0569930094590715" calcext:value-type="float">
            <text:p>0.0569930094590715</text:p>
          </table:table-cell>
          <table:table-cell office:value-type="float" office:value="0.0530686867032268" calcext:value-type="float">
            <text:p>0.053068686703226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59698801733496" calcext:value-type="float">
            <text:p>0.0159698801733496</text:p>
          </table:table-cell>
          <table:table-cell office:value-type="float" office:value="0.0747665970269624" calcext:value-type="float">
            <text:p>0.0747665970269624</text:p>
          </table:table-cell>
          <table:table-cell office:value-type="float" office:value="0.0322321993634374" calcext:value-type="float">
            <text:p>0.032232199363437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612629201714896" calcext:value-type="float">
            <text:p>0.0612629201714896</text:p>
          </table:table-cell>
          <table:table-cell office:value-type="float" office:value="0.0569930094590715" calcext:value-type="float">
            <text:p>0.0569930094590715</text:p>
          </table:table-cell>
          <table:table-cell office:value-type="float" office:value="0.0530686867032268" calcext:value-type="float">
            <text:p>0.0530686867032268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1.60351533156175" calcext:value-type="float" table:number-columns-spanned="4" table:number-rows-spanned="1">
            <text:p>1.60351533156175</text:p>
          </table:table-cell>
          <table:covered-table-cell table:number-columns-repeated="3"/>
          <table:table-cell/>
          <table:table-cell table:style-name="ce1" office:value-type="float" office:value="1.92406091934595" calcext:value-type="float" table:number-columns-spanned="4" table:number-rows-spanned="1">
            <text:p>1.92406091934595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45311241759147" calcext:value-type="float">
            <text:p>0.0145311241759147</text:p>
          </table:table-cell>
          <table:table-cell office:value-type="float" office:value="0.0123185256294987" calcext:value-type="float">
            <text:p>0.0123185256294987</text:p>
          </table:table-cell>
          <table:table-cell office:value-type="float" office:value="0.00608477059693291" calcext:value-type="float">
            <text:p>0.006084770596932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979578646893" calcext:value-type="float">
            <text:p>0.011979578646893</text:p>
          </table:table-cell>
          <table:table-cell office:value-type="float" office:value="0.00926572972621724" calcext:value-type="float">
            <text:p>0.00926572972621724</text:p>
          </table:table-cell>
          <table:table-cell office:value-type="float" office:value="0.00949220484734932" calcext:value-type="float">
            <text:p>0.0094922048473493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33786081559239" calcext:value-type="float">
            <text:p>0.0133786081559239</text:p>
          </table:table-cell>
          <table:table-cell office:value-type="float" office:value="0.0131796038887959" calcext:value-type="float">
            <text:p>0.0131796038887959</text:p>
          </table:table-cell>
          <table:table-cell office:value-type="float" office:value="0.00971622930003458" calcext:value-type="float">
            <text:p>0.0097162293000345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36419076320791" calcext:value-type="float">
            <text:p>0.0136419076320791</text:p>
          </table:table-cell>
          <table:table-cell office:value-type="float" office:value="0.0114661074018246" calcext:value-type="float">
            <text:p>0.0114661074018246</text:p>
          </table:table-cell>
          <table:table-cell office:value-type="float" office:value="0.0072906354217201" calcext:value-type="float">
            <text:p>0.007290635421720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59661102708986" calcext:value-type="float">
            <text:p>0.0159661102708986</text:p>
          </table:table-cell>
          <table:table-cell office:value-type="float" office:value="0.01094939395699" calcext:value-type="float">
            <text:p>0.01094939395699</text:p>
          </table:table-cell>
          <table:table-cell office:value-type="float" office:value="0.0117436517796757" calcext:value-type="float">
            <text:p>0.011743651779675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56736406638316" calcext:value-type="float">
            <text:p>0.0156736406638316</text:p>
          </table:table-cell>
          <table:table-cell office:value-type="float" office:value="0.0129599186248288" calcext:value-type="float">
            <text:p>0.0129599186248288</text:p>
          </table:table-cell>
          <table:table-cell office:value-type="float" office:value="0.00904238137167033" calcext:value-type="float">
            <text:p>0.0090423813716703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78626567723149" calcext:value-type="float">
            <text:p>0.0178626567723149</text:p>
          </table:table-cell>
          <table:table-cell office:value-type="float" office:value="0.0127699708123327" calcext:value-type="float">
            <text:p>0.0127699708123327</text:p>
          </table:table-cell>
          <table:table-cell office:value-type="float" office:value="0.00848843783550436" calcext:value-type="float">
            <text:p>0.0084884378355043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82862493939114" calcext:value-type="float">
            <text:p>0.0182862493939114</text:p>
          </table:table-cell>
          <table:table-cell office:value-type="float" office:value="0.0163945198160894" calcext:value-type="float">
            <text:p>0.0163945198160894</text:p>
          </table:table-cell>
          <table:table-cell office:value-type="float" office:value="0.0116164779361218" calcext:value-type="float">
            <text:p>0.011616477936121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123286521657843" calcext:value-type="float">
            <text:p>0.0123286521657843</text:p>
          </table:table-cell>
          <table:table-cell office:value-type="float" office:value="0.0156064836229331" calcext:value-type="float">
            <text:p>0.0156064836229331</text:p>
          </table:table-cell>
          <table:table-cell office:value-type="float" office:value="0.0115592708056212" calcext:value-type="float">
            <text:p>0.01155927080562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23696084067004" calcext:value-type="float">
            <text:p>0.0123696084067004</text:p>
          </table:table-cell>
          <table:table-cell office:value-type="float" office:value="0.0107835653733187" calcext:value-type="float">
            <text:p>0.0107835653733187</text:p>
          </table:table-cell>
          <table:table-cell office:value-type="float" office:value="0.014763921557232" calcext:value-type="float">
            <text:p>0.01476392155723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335537337822512" calcext:value-type="float">
            <text:p>0.0335537337822512</text:p>
          </table:table-cell>
          <table:table-cell office:value-type="float" office:value="0.0100916669836755" calcext:value-type="float">
            <text:p>0.0100916669836755</text:p>
          </table:table-cell>
          <table:table-cell office:value-type="float" office:value="0.0137664319684855" calcext:value-type="float">
            <text:p>0.013766431968485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357484746154644" calcext:value-type="float">
            <text:p>0.0357484746154644</text:p>
          </table:table-cell>
          <table:table-cell office:value-type="float" office:value="0.0319532347950384" calcext:value-type="float">
            <text:p>0.0319532347950384</text:p>
          </table:table-cell>
          <table:table-cell office:value-type="float" office:value="0.0108361883690394" calcext:value-type="float">
            <text:p>0.010836188369039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507022576571237" calcext:value-type="float">
            <text:p>0.0507022576571237</text:p>
          </table:table-cell>
          <table:table-cell office:value-type="float" office:value="0.0303633624297924" calcext:value-type="float">
            <text:p>0.0303633624297924</text:p>
          </table:table-cell>
          <table:table-cell office:value-type="float" office:value="0.008616880649105" calcext:value-type="float">
            <text:p>0.0086168806491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487675445095849" calcext:value-type="float">
            <text:p>0.0487675445095849</text:p>
          </table:table-cell>
          <table:table-cell office:value-type="float" office:value="0.0470846267898569" calcext:value-type="float">
            <text:p>0.0470846267898569</text:p>
          </table:table-cell>
          <table:table-cell office:value-type="float" office:value="0.0286658011546461" calcext:value-type="float">
            <text:p>0.028665801154646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507022576571237" calcext:value-type="float">
            <text:p>0.0507022576571237</text:p>
          </table:table-cell>
          <table:table-cell office:value-type="float" office:value="0.0471555442124812" calcext:value-type="float">
            <text:p>0.0471555442124812</text:p>
          </table:table-cell>
          <table:table-cell office:value-type="float" office:value="0.0281554798738857" calcext:value-type="float">
            <text:p>0.028155479873885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487675445095849" calcext:value-type="float">
            <text:p>0.0487675445095849</text:p>
          </table:table-cell>
          <table:table-cell office:value-type="float" office:value="0.0470846267898569" calcext:value-type="float">
            <text:p>0.0470846267898569</text:p>
          </table:table-cell>
          <table:table-cell office:value-type="float" office:value="0.0461892999206398" calcext:value-type="float">
            <text:p>0.046189299920639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507022576571237" calcext:value-type="float">
            <text:p>0.0507022576571237</text:p>
          </table:table-cell>
          <table:table-cell office:value-type="float" office:value="0.0471555442124812" calcext:value-type="float">
            <text:p>0.0471555442124812</text:p>
          </table:table-cell>
          <table:table-cell office:value-type="float" office:value="0.0431640134009286" calcext:value-type="float">
            <text:p>0.043164013400928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487675445095849" calcext:value-type="float">
            <text:p>0.0487675445095849</text:p>
          </table:table-cell>
          <table:table-cell office:value-type="float" office:value="0.0470846267898569" calcext:value-type="float">
            <text:p>0.0470846267898569</text:p>
          </table:table-cell>
          <table:table-cell office:value-type="float" office:value="0.0461892999206398" calcext:value-type="float">
            <text:p>0.046189299920639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507022576571237" calcext:value-type="float">
            <text:p>0.0507022576571237</text:p>
          </table:table-cell>
          <table:table-cell office:value-type="float" office:value="0.0471555442124812" calcext:value-type="float">
            <text:p>0.0471555442124812</text:p>
          </table:table-cell>
          <table:table-cell office:value-type="float" office:value="0.0431640134009286" calcext:value-type="float">
            <text:p>0.043164013400928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487675445095849" calcext:value-type="float">
            <text:p>0.0487675445095849</text:p>
          </table:table-cell>
          <table:table-cell office:value-type="float" office:value="0.0470846267898569" calcext:value-type="float">
            <text:p>0.0470846267898569</text:p>
          </table:table-cell>
          <table:table-cell office:value-type="float" office:value="0.0461892999206398" calcext:value-type="float">
            <text:p>0.0461892999206398</text:p>
          </table:table-cell>
        </table:table-row>
      </table:table>
      <table:table table:name="C_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-9.61827180324457" calcext:value-type="float" table:number-columns-spanned="4" table:number-rows-spanned="1">
            <text:p>-9.61827180324457</text:p>
          </table:table-cell>
          <table:covered-table-cell table:number-columns-repeated="3"/>
          <table:table-cell/>
          <table:table-cell table:style-name="ce1" office:value-type="float" office:value="-4.8094724997496" calcext:value-type="float" table:number-columns-spanned="4" table:number-rows-spanned="1">
            <text:p>-4.8094724997496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5048.648449974" calcext:value-type="float">
            <text:p>375048.648449974</text:p>
          </table:table-cell>
          <table:table-cell office:value-type="float" office:value="524831.623596352" calcext:value-type="float">
            <text:p>524831.623596352</text:p>
          </table:table-cell>
          <table:table-cell office:value-type="float" office:value="625952.677343929" calcext:value-type="float">
            <text:p>625952.677343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1.436867621172" calcext:value-type="float">
            <text:p>571.436867621172</text:p>
          </table:table-cell>
          <table:table-cell office:value-type="float" office:value="732.964321788551" calcext:value-type="float">
            <text:p>732.964321788551</text:p>
          </table:table-cell>
          <table:table-cell office:value-type="float" office:value="942.715839194136" calcext:value-type="float">
            <text:p>942.71583919413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159.90322992473" calcext:value-type="float">
            <text:p>1159.90322992473</text:p>
          </table:table-cell>
          <table:table-cell office:value-type="float" office:value="1405.79332031861" calcext:value-type="float">
            <text:p>1405.79332031861</text:p>
          </table:table-cell>
          <table:table-cell office:value-type="float" office:value="1716.70628373224" calcext:value-type="float">
            <text:p>1716.706283732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776.492599841087" calcext:value-type="float">
            <text:p>776.492599841087</text:p>
          </table:table-cell>
          <table:table-cell office:value-type="float" office:value="917.222216669848" calcext:value-type="float">
            <text:p>917.222216669848</text:p>
          </table:table-cell>
          <table:table-cell office:value-type="float" office:value="1102.53007322919" calcext:value-type="float">
            <text:p>1102.5300732291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51.997619966643" calcext:value-type="float">
            <text:p>951.997619966643</text:p>
          </table:table-cell>
          <table:table-cell office:value-type="float" office:value="1069.22919322274" calcext:value-type="float">
            <text:p>1069.22919322274</text:p>
          </table:table-cell>
          <table:table-cell office:value-type="float" office:value="1253.24601351832" calcext:value-type="float">
            <text:p>1253.246013518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753.236080749716" calcext:value-type="float">
            <text:p>753.236080749716</text:p>
          </table:table-cell>
          <table:table-cell office:value-type="float" office:value="844.072444579772" calcext:value-type="float">
            <text:p>844.072444579772</text:p>
          </table:table-cell>
          <table:table-cell office:value-type="float" office:value="1001.69989805492" calcext:value-type="float">
            <text:p>1001.6998980549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023.52734053905" calcext:value-type="float">
            <text:p>1023.52734053905</text:p>
          </table:table-cell>
          <table:table-cell office:value-type="float" office:value="1175.14717943764" calcext:value-type="float">
            <text:p>1175.14717943764</text:p>
          </table:table-cell>
          <table:table-cell office:value-type="float" office:value="1397.34444464425" calcext:value-type="float">
            <text:p>1397.3444446442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751.662832923594" calcext:value-type="float">
            <text:p>751.662832923594</text:p>
          </table:table-cell>
          <table:table-cell office:value-type="float" office:value="854.007968237226" calcext:value-type="float">
            <text:p>854.007968237226</text:p>
          </table:table-cell>
          <table:table-cell office:value-type="float" office:value="1025.52091903243" calcext:value-type="float">
            <text:p>1025.5209190324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264.66379771681" calcext:value-type="float">
            <text:p>1264.66379771681</text:p>
          </table:table-cell>
          <table:table-cell office:value-type="float" office:value="1367.23744100121" calcext:value-type="float">
            <text:p>1367.23744100121</text:p>
          </table:table-cell>
          <table:table-cell office:value-type="float" office:value="1618.7833231449" calcext:value-type="float">
            <text:p>1618.783323144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00.58924291639" calcext:value-type="float">
            <text:p>1000.58924291639</text:p>
          </table:table-cell>
          <table:table-cell office:value-type="float" office:value="1173.64427163133" calcext:value-type="float">
            <text:p>1173.64427163133</text:p>
          </table:table-cell>
          <table:table-cell office:value-type="float" office:value="1302.96604860053" calcext:value-type="float">
            <text:p>1302.9660486005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218.91192846864" calcext:value-type="float">
            <text:p>1218.91192846864</text:p>
          </table:table-cell>
          <table:table-cell office:value-type="float" office:value="1260.55061265114" calcext:value-type="float">
            <text:p>1260.55061265114</text:p>
          </table:table-cell>
          <table:table-cell office:value-type="float" office:value="1431.20308484048" calcext:value-type="float">
            <text:p>1431.2030848404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18.166575722267" calcext:value-type="float">
            <text:p>918.166575722267</text:p>
          </table:table-cell>
          <table:table-cell office:value-type="float" office:value="1054.09831129935" calcext:value-type="float">
            <text:p>1054.09831129935</text:p>
          </table:table-cell>
          <table:table-cell office:value-type="float" office:value="1204.36098923799" calcext:value-type="float">
            <text:p>1204.3609892379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324.16097822888" calcext:value-type="float">
            <text:p>1324.16097822888</text:p>
          </table:table-cell>
          <table:table-cell office:value-type="float" office:value="1207.99777638843" calcext:value-type="float">
            <text:p>1207.99777638843</text:p>
          </table:table-cell>
          <table:table-cell office:value-type="float" office:value="1258.51579278261" calcext:value-type="float">
            <text:p>1258.5157927826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80.777541964084" calcext:value-type="float">
            <text:p>880.777541964084</text:p>
          </table:table-cell>
          <table:table-cell office:value-type="float" office:value="1011.54400364465" calcext:value-type="float">
            <text:p>1011.54400364465</text:p>
          </table:table-cell>
          <table:table-cell office:value-type="float" office:value="1141.33303023627" calcext:value-type="float">
            <text:p>1141.3330302362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24.16097822888" calcext:value-type="float">
            <text:p>1324.16097822888</text:p>
          </table:table-cell>
          <table:table-cell office:value-type="float" office:value="1364.09991275882" calcext:value-type="float">
            <text:p>1364.09991275882</text:p>
          </table:table-cell>
          <table:table-cell office:value-type="float" office:value="1417.8301866691" calcext:value-type="float">
            <text:p>1417.830186669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246.20849208519" calcext:value-type="float">
            <text:p>1246.20849208519</text:p>
          </table:table-cell>
          <table:table-cell office:value-type="float" office:value="1278.60205976223" calcext:value-type="float">
            <text:p>1278.60205976223</text:p>
          </table:table-cell>
          <table:table-cell office:value-type="float" office:value="1336.26018427124" calcext:value-type="float">
            <text:p>1336.2601842712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324.16097822888" calcext:value-type="float">
            <text:p>1324.16097822888</text:p>
          </table:table-cell>
          <table:table-cell office:value-type="float" office:value="1364.09991275882" calcext:value-type="float">
            <text:p>1364.09991275882</text:p>
          </table:table-cell>
          <table:table-cell office:value-type="float" office:value="1072.06296400368" calcext:value-type="float">
            <text:p>1072.062964003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649.2656464158" calcext:value-type="float">
            <text:p>649.2656464158</text:p>
          </table:table-cell>
          <table:table-cell office:value-type="float" office:value="643.831380339981" calcext:value-type="float">
            <text:p>643.831380339981</text:p>
          </table:table-cell>
          <table:table-cell office:value-type="float" office:value="632.000490105816" calcext:value-type="float">
            <text:p>632.00049010581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324.16097822888" calcext:value-type="float">
            <text:p>1324.16097822888</text:p>
          </table:table-cell>
          <table:table-cell office:value-type="float" office:value="1364.09991275882" calcext:value-type="float">
            <text:p>1364.09991275882</text:p>
          </table:table-cell>
          <table:table-cell office:value-type="float" office:value="1072.06296400368" calcext:value-type="float">
            <text:p>1072.0629640036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49.2656464158" calcext:value-type="float">
            <text:p>649.2656464158</text:p>
          </table:table-cell>
          <table:table-cell office:value-type="float" office:value="401.679725383198" calcext:value-type="float">
            <text:p>401.679725383198</text:p>
          </table:table-cell>
          <table:table-cell office:value-type="float" office:value="437.308871030655" calcext:value-type="float">
            <text:p>437.308871030655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-0.960873090303861" calcext:value-type="float" table:number-columns-spanned="4" table:number-rows-spanned="1">
            <text:p>-0.960873090303861</text:p>
          </table:table-cell>
          <table:covered-table-cell table:number-columns-repeated="3"/>
          <table:table-cell/>
          <table:table-cell table:style-name="ce1" office:value-type="float" office:value="-0.320581778501853" calcext:value-type="float" table:number-columns-spanned="4" table:number-rows-spanned="1">
            <text:p>-0.320581778501853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7.519001559428" calcext:value-type="float">
            <text:p>497.519001559428</text:p>
          </table:table-cell>
          <table:table-cell office:value-type="float" office:value="727.947791359468" calcext:value-type="float">
            <text:p>727.947791359468</text:p>
          </table:table-cell>
          <table:table-cell office:value-type="float" office:value="970.156469311073" calcext:value-type="float">
            <text:p>970.156469311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2.591835881055" calcext:value-type="float">
            <text:p>602.591835881055</text:p>
          </table:table-cell>
          <table:table-cell office:value-type="float" office:value="915.993597865675" calcext:value-type="float">
            <text:p>915.993597865675</text:p>
          </table:table-cell>
          <table:table-cell office:value-type="float" office:value="1179.81224264142" calcext:value-type="float">
            <text:p>1179.8122426414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638.836101026978" calcext:value-type="float">
            <text:p>638.836101026978</text:p>
          </table:table-cell>
          <table:table-cell office:value-type="float" office:value="750.721153714109" calcext:value-type="float">
            <text:p>750.721153714109</text:p>
          </table:table-cell>
          <table:table-cell office:value-type="float" office:value="899.214507222865" calcext:value-type="float">
            <text:p>899.21450722286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672.205592850799" calcext:value-type="float">
            <text:p>672.205592850799</text:p>
          </table:table-cell>
          <table:table-cell office:value-type="float" office:value="775.710665648391" calcext:value-type="float">
            <text:p>775.710665648391</text:p>
          </table:table-cell>
          <table:table-cell office:value-type="float" office:value="946.58112295029" calcext:value-type="float">
            <text:p>946.581122950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620.196968289486" calcext:value-type="float">
            <text:p>620.196968289486</text:p>
          </table:table-cell>
          <table:table-cell office:value-type="float" office:value="713.398561688199" calcext:value-type="float">
            <text:p>713.398561688199</text:p>
          </table:table-cell>
          <table:table-cell office:value-type="float" office:value="833.612055893766" calcext:value-type="float">
            <text:p>833.61205589376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45.053215858213" calcext:value-type="float">
            <text:p>645.053215858213</text:p>
          </table:table-cell>
          <table:table-cell office:value-type="float" office:value="744.688179627271" calcext:value-type="float">
            <text:p>744.688179627271</text:p>
          </table:table-cell>
          <table:table-cell office:value-type="float" office:value="871.625790849877" calcext:value-type="float">
            <text:p>871.62579084987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624.298651106496" calcext:value-type="float">
            <text:p>624.298651106496</text:p>
          </table:table-cell>
          <table:table-cell office:value-type="float" office:value="726.41368533453" calcext:value-type="float">
            <text:p>726.41368533453</text:p>
          </table:table-cell>
          <table:table-cell office:value-type="float" office:value="868.748380524749" calcext:value-type="float">
            <text:p>868.74838052474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653.380582189803" calcext:value-type="float">
            <text:p>653.380582189803</text:p>
          </table:table-cell>
          <table:table-cell office:value-type="float" office:value="764.279366391866" calcext:value-type="float">
            <text:p>764.279366391866</text:p>
          </table:table-cell>
          <table:table-cell office:value-type="float" office:value="899.861273847679" calcext:value-type="float">
            <text:p>899.86127384767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26.612438694642" calcext:value-type="float">
            <text:p>926.612438694642</text:p>
          </table:table-cell>
          <table:table-cell office:value-type="float" office:value="1098.92719349101" calcext:value-type="float">
            <text:p>1098.92719349101</text:p>
          </table:table-cell>
          <table:table-cell office:value-type="float" office:value="1248.50515863718" calcext:value-type="float">
            <text:p>1248.505158637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944.177996833064" calcext:value-type="float">
            <text:p>944.177996833064</text:p>
          </table:table-cell>
          <table:table-cell office:value-type="float" office:value="1083.94712392653" calcext:value-type="float">
            <text:p>1083.94712392653</text:p>
          </table:table-cell>
          <table:table-cell office:value-type="float" office:value="1252.67271787457" calcext:value-type="float">
            <text:p>1252.6727178745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916.646626978831" calcext:value-type="float">
            <text:p>916.646626978831</text:p>
          </table:table-cell>
          <table:table-cell office:value-type="float" office:value="1038.93226856303" calcext:value-type="float">
            <text:p>1038.93226856303</text:p>
          </table:table-cell>
          <table:table-cell office:value-type="float" office:value="1181.48655459494" calcext:value-type="float">
            <text:p>1181.4865545949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09.841400203883" calcext:value-type="float">
            <text:p>909.841400203883</text:p>
          </table:table-cell>
          <table:table-cell office:value-type="float" office:value="1052.9180026473" calcext:value-type="float">
            <text:p>1052.9180026473</text:p>
          </table:table-cell>
          <table:table-cell office:value-type="float" office:value="1190.18264415138" calcext:value-type="float">
            <text:p>1190.1826441513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19.540460315631" calcext:value-type="float">
            <text:p>919.540460315631</text:p>
          </table:table-cell>
          <table:table-cell office:value-type="float" office:value="989.859609646585" calcext:value-type="float">
            <text:p>989.859609646585</text:p>
          </table:table-cell>
          <table:table-cell office:value-type="float" office:value="1075.45646533421" calcext:value-type="float">
            <text:p>1075.4564653342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929.765628919848" calcext:value-type="float">
            <text:p>929.765628919848</text:p>
          </table:table-cell>
          <table:table-cell office:value-type="float" office:value="1056.17647774867" calcext:value-type="float">
            <text:p>1056.17647774867</text:p>
          </table:table-cell>
          <table:table-cell office:value-type="float" office:value="1143.15227156011" calcext:value-type="float">
            <text:p>1143.1522715601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954.347969292257" calcext:value-type="float">
            <text:p>954.347969292257</text:p>
          </table:table-cell>
          <table:table-cell office:value-type="float" office:value="1058.92879285714" calcext:value-type="float">
            <text:p>1058.92879285714</text:p>
          </table:table-cell>
          <table:table-cell office:value-type="float" office:value="1160.87304008035" calcext:value-type="float">
            <text:p>1160.8730400803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976.219717900361" calcext:value-type="float">
            <text:p>976.219717900361</text:p>
          </table:table-cell>
          <table:table-cell office:value-type="float" office:value="1048.26744202768" calcext:value-type="float">
            <text:p>1048.26744202768</text:p>
          </table:table-cell>
          <table:table-cell office:value-type="float" office:value="1146.99656340192" calcext:value-type="float">
            <text:p>1146.9965634019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754.082032785149" calcext:value-type="float">
            <text:p>754.082032785149</text:p>
          </table:table-cell>
          <table:table-cell office:value-type="float" office:value="794.014387499953" calcext:value-type="float">
            <text:p>794.014387499953</text:p>
          </table:table-cell>
          <table:table-cell office:value-type="float" office:value="853.313739847594" calcext:value-type="float">
            <text:p>853.31373984759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754.737186214632" calcext:value-type="float">
            <text:p>754.737186214632</text:p>
          </table:table-cell>
          <table:table-cell office:value-type="float" office:value="799.539039374876" calcext:value-type="float">
            <text:p>799.539039374876</text:p>
          </table:table-cell>
          <table:table-cell office:value-type="float" office:value="859.984161295439" calcext:value-type="float">
            <text:p>859.98416129543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82.696625229736" calcext:value-type="float">
            <text:p>482.696625229736</text:p>
          </table:table-cell>
          <table:table-cell office:value-type="float" office:value="524.711993993523" calcext:value-type="float">
            <text:p>524.711993993523</text:p>
          </table:table-cell>
          <table:table-cell office:value-type="float" office:value="584.449762115293" calcext:value-type="float">
            <text:p>584.44976211529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94.217150084539" calcext:value-type="float">
            <text:p>494.217150084539</text:p>
          </table:table-cell>
          <table:table-cell office:value-type="float" office:value="531.354382027793" calcext:value-type="float">
            <text:p>531.354382027793</text:p>
          </table:table-cell>
          <table:table-cell office:value-type="float" office:value="591.100282805913" calcext:value-type="float">
            <text:p>591.10028280591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0.322026228293394" calcext:value-type="float" table:number-columns-spanned="4" table:number-rows-spanned="1">
            <text:p>0.322026228293394</text:p>
          </table:table-cell>
          <table:covered-table-cell table:number-columns-repeated="3"/>
          <table:table-cell/>
          <table:table-cell table:style-name="ce1" office:value-type="float" office:value="0.963226465078501" calcext:value-type="float" table:number-columns-spanned="4" table:number-rows-spanned="1">
            <text:p>0.963226465078501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5.430130821415" calcext:value-type="float">
            <text:p>645.430130821415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862.408886305344" calcext:value-type="float">
            <text:p>862.408886305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4.730084085008" calcext:value-type="float">
            <text:p>704.730084085008</text:p>
          </table:table-cell>
          <table:table-cell office:value-type="float" office:value="796.71670204175" calcext:value-type="float">
            <text:p>796.71670204175</text:p>
          </table:table-cell>
          <table:table-cell office:value-type="float" office:value="946.983348910683" calcext:value-type="float">
            <text:p>946.98334891068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645.430130821415" calcext:value-type="float">
            <text:p>645.430130821415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862.408886305344" calcext:value-type="float">
            <text:p>862.4088863053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682.883476175586" calcext:value-type="float">
            <text:p>682.883476175586</text:p>
          </table:table-cell>
          <table:table-cell office:value-type="float" office:value="757.678503338422" calcext:value-type="float">
            <text:p>757.678503338422</text:p>
          </table:table-cell>
          <table:table-cell office:value-type="float" office:value="887.161835934911" calcext:value-type="float">
            <text:p>887.16183593491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879.993881307122" calcext:value-type="float">
            <text:p>879.99388130712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33.395058953854" calcext:value-type="float">
            <text:p>633.395058953854</text:p>
          </table:table-cell>
          <table:table-cell office:value-type="float" office:value="711.674997132905" calcext:value-type="float">
            <text:p>711.674997132905</text:p>
          </table:table-cell>
          <table:table-cell office:value-type="float" office:value="849.286896538658" calcext:value-type="float">
            <text:p>849.28689653865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879.993881307122" calcext:value-type="float">
            <text:p>879.99388130712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927.032274622301" calcext:value-type="float">
            <text:p>927.032274622301</text:p>
          </table:table-cell>
          <table:table-cell office:value-type="float" office:value="1018.11208179599" calcext:value-type="float">
            <text:p>1018.11208179599</text:p>
          </table:table-cell>
          <table:table-cell office:value-type="float" office:value="1146.15975240705" calcext:value-type="float">
            <text:p>1146.1597524070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879.993881307122" calcext:value-type="float">
            <text:p>879.99388130712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903.57556617401" calcext:value-type="float">
            <text:p>903.57556617401</text:p>
          </table:table-cell>
          <table:table-cell office:value-type="float" office:value="968.358710460414" calcext:value-type="float">
            <text:p>968.358710460414</text:p>
          </table:table-cell>
          <table:table-cell office:value-type="float" office:value="1054.30384186608" calcext:value-type="float">
            <text:p>1054.3038418660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1151.75841568185" calcext:value-type="float">
            <text:p>1151.7584156818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37.530313755239" calcext:value-type="float">
            <text:p>937.530313755239</text:p>
          </table:table-cell>
          <table:table-cell office:value-type="float" office:value="1067.83602239428" calcext:value-type="float">
            <text:p>1067.83602239428</text:p>
          </table:table-cell>
          <table:table-cell office:value-type="float" office:value="1214.81250987349" calcext:value-type="float">
            <text:p>1214.8125098734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1042.50422156459" calcext:value-type="float">
            <text:p>1042.50422156459</text:p>
          </table:table-cell>
          <table:table-cell office:value-type="float" office:value="1114.77161556301" calcext:value-type="float">
            <text:p>1114.7716155630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04.66873517708" calcext:value-type="float">
            <text:p>1004.66873517708</text:p>
          </table:table-cell>
          <table:table-cell office:value-type="float" office:value="1079.67154814756" calcext:value-type="float">
            <text:p>1079.67154814756</text:p>
          </table:table-cell>
          <table:table-cell office:value-type="float" office:value="1121.31894344376" calcext:value-type="float">
            <text:p>1121.3189434437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502.078889842115" calcext:value-type="float">
            <text:p>502.078889842115</text:p>
          </table:table-cell>
          <table:table-cell office:value-type="float" office:value="837.449976374495" calcext:value-type="float">
            <text:p>837.44997637449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699.096851693738" calcext:value-type="float">
            <text:p>699.096851693738</text:p>
          </table:table-cell>
          <table:table-cell office:value-type="float" office:value="733.271792259711" calcext:value-type="float">
            <text:p>733.271792259711</text:p>
          </table:table-cell>
          <table:table-cell office:value-type="float" office:value="801.259977023257" calcext:value-type="float">
            <text:p>801.25997702325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502.078889842115" calcext:value-type="float">
            <text:p>502.078889842115</text:p>
          </table:table-cell>
          <table:table-cell office:value-type="float" office:value="837.449976374495" calcext:value-type="float">
            <text:p>837.4499763744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438.536846421278" calcext:value-type="float">
            <text:p>438.536846421278</text:p>
          </table:table-cell>
          <table:table-cell office:value-type="float" office:value="473.273991427527" calcext:value-type="float">
            <text:p>473.273991427527</text:p>
          </table:table-cell>
          <table:table-cell office:value-type="float" office:value="520.593227330271" calcext:value-type="float">
            <text:p>520.59322733027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502.078889842115" calcext:value-type="float">
            <text:p>502.078889842115</text:p>
          </table:table-cell>
          <table:table-cell office:value-type="float" office:value="837.449976374495" calcext:value-type="float">
            <text:p>837.44997637449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53.919996899601" calcext:value-type="float">
            <text:p>953.919996899601</text:p>
          </table:table-cell>
          <table:table-cell office:value-type="float" office:value="473.273991427527" calcext:value-type="float">
            <text:p>473.273991427527</text:p>
          </table:table-cell>
          <table:table-cell office:value-type="float" office:value="520.593227330271" calcext:value-type="float">
            <text:p>520.59322733027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float" office:value="1.60351533156175" calcext:value-type="float" table:number-columns-spanned="4" table:number-rows-spanned="1">
            <text:p>1.60351533156175</text:p>
          </table:table-cell>
          <table:covered-table-cell table:number-columns-repeated="3"/>
          <table:table-cell/>
          <table:table-cell table:style-name="ce1" office:value-type="float" office:value="1.92406091934595" calcext:value-type="float" table:number-columns-spanned="4" table:number-rows-spanned="1">
            <text:p>1.92406091934595</text:p>
          </table:table-cell>
          <table:covered-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36.48768981613" calcext:value-type="float">
            <text:p>1036.48768981613</text:p>
          </table:table-cell>
          <table:table-cell office:value-type="float" office:value="835.686630005248" calcext:value-type="float">
            <text:p>835.686630005248</text:p>
          </table:table-cell>
          <table:table-cell office:value-type="float" office:value="1081.14414911427" calcext:value-type="float">
            <text:p>1081.14414911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1.292097729902" calcext:value-type="float">
            <text:p>991.292097729902</text:p>
          </table:table-cell>
          <table:table-cell office:value-type="float" office:value="1110.38063825923" calcext:value-type="float">
            <text:p>1110.38063825923</text:p>
          </table:table-cell>
          <table:table-cell office:value-type="float" office:value="1069.26947841736" calcext:value-type="float">
            <text:p>1069.2694784173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935.984338919748" calcext:value-type="float">
            <text:p>935.984338919748</text:p>
          </table:table-cell>
          <table:table-cell office:value-type="float" office:value="1333.88129096757" calcext:value-type="float">
            <text:p>1333.88129096757</text:p>
          </table:table-cell>
          <table:table-cell office:value-type="float" office:value="1011.25789762967" calcext:value-type="float">
            <text:p>1011.2578976296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28.455308273977" calcext:value-type="float">
            <text:p>928.455308273977</text:p>
          </table:table-cell>
          <table:table-cell office:value-type="float" office:value="1059.53727862117" calcext:value-type="float">
            <text:p>1059.53727862117</text:p>
          </table:table-cell>
          <table:table-cell office:value-type="float" office:value="1321.11271537775" calcext:value-type="float">
            <text:p>1321.1127153777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05.638209501089" calcext:value-type="float">
            <text:p>905.638209501089</text:p>
          </table:table-cell>
          <table:table-cell office:value-type="float" office:value="1075.54617197992" calcext:value-type="float">
            <text:p>1075.54617197992</text:p>
          </table:table-cell>
          <table:table-cell office:value-type="float" office:value="1736.55389506661" calcext:value-type="float">
            <text:p>1736.553895066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45.857314973298" calcext:value-type="float">
            <text:p>945.857314973298</text:p>
          </table:table-cell>
          <table:table-cell office:value-type="float" office:value="1010.25884842023" calcext:value-type="float">
            <text:p>1010.25884842023</text:p>
          </table:table-cell>
          <table:table-cell office:value-type="float" office:value="1150.36267367768" calcext:value-type="float">
            <text:p>1150.3626736776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76.810559897871" calcext:value-type="float">
            <text:p>976.810559897871</text:p>
          </table:table-cell>
          <table:table-cell office:value-type="float" office:value="1040.21406918774" calcext:value-type="float">
            <text:p>1040.21406918774</text:p>
          </table:table-cell>
          <table:table-cell office:value-type="float" office:value="1133.750291248" calcext:value-type="float">
            <text:p>1133.75029124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104.0340737638" calcext:value-type="float">
            <text:p>1104.0340737638</text:p>
          </table:table-cell>
          <table:table-cell office:value-type="float" office:value="1291.74503680783" calcext:value-type="float">
            <text:p>1291.74503680783</text:p>
          </table:table-cell>
          <table:table-cell office:value-type="float" office:value="1113.47214095653" calcext:value-type="float">
            <text:p>1113.4721409565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97.134452545195" calcext:value-type="float">
            <text:p>997.134452545195</text:p>
          </table:table-cell>
          <table:table-cell office:value-type="float" office:value="1069.45351947977" calcext:value-type="float">
            <text:p>1069.45351947977</text:p>
          </table:table-cell>
          <table:table-cell office:value-type="float" office:value="1213.03383422998" calcext:value-type="float">
            <text:p>1213.0338342299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902.22563646243" calcext:value-type="float">
            <text:p>902.22563646243</text:p>
          </table:table-cell>
          <table:table-cell office:value-type="float" office:value="892.84888765341" calcext:value-type="float">
            <text:p>892.84888765341</text:p>
          </table:table-cell>
          <table:table-cell office:value-type="float" office:value="1651.66945871112" calcext:value-type="float">
            <text:p>1651.6694587111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641.452357535268" calcext:value-type="float">
            <text:p>641.452357535268</text:p>
          </table:table-cell>
          <table:table-cell office:value-type="float" office:value="1053.40584629504" calcext:value-type="float">
            <text:p>1053.40584629504</text:p>
          </table:table-cell>
          <table:table-cell office:value-type="float" office:value="1176.13981811032" calcext:value-type="float">
            <text:p>1176.1398181103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74.750569618313" calcext:value-type="float">
            <text:p>574.750569618313</text:p>
          </table:table-cell>
          <table:table-cell office:value-type="float" office:value="590.78684552854" calcext:value-type="float">
            <text:p>590.78684552854</text:p>
          </table:table-cell>
          <table:table-cell office:value-type="float" office:value="773.347976877209" calcext:value-type="float">
            <text:p>773.34797687720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411.212851248204" calcext:value-type="float">
            <text:p>411.212851248204</text:p>
          </table:table-cell>
          <table:table-cell office:value-type="float" office:value="683.422653905484" calcext:value-type="float">
            <text:p>683.422653905484</text:p>
          </table:table-cell>
          <table:table-cell office:value-type="float" office:value="1118.89742557524" calcext:value-type="float">
            <text:p>1118.8974255752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77.638239434614" calcext:value-type="float">
            <text:p>377.638239434614</text:p>
          </table:table-cell>
          <table:table-cell office:value-type="float" office:value="377.294781616954" calcext:value-type="float">
            <text:p>377.294781616954</text:p>
          </table:table-cell>
          <table:table-cell office:value-type="float" office:value="611.426949020729" calcext:value-type="float">
            <text:p>611.42694902072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411.212851248204" calcext:value-type="float">
            <text:p>411.212851248204</text:p>
          </table:table-cell>
          <table:table-cell office:value-type="float" office:value="417.697711241573" calcext:value-type="float">
            <text:p>417.697711241573</text:p>
          </table:table-cell>
          <table:table-cell office:value-type="float" office:value="734.707575880506" calcext:value-type="float">
            <text:p>734.70757588050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377.638239434614" calcext:value-type="float">
            <text:p>377.638239434614</text:p>
          </table:table-cell>
          <table:table-cell office:value-type="float" office:value="377.294781616954" calcext:value-type="float">
            <text:p>377.294781616954</text:p>
          </table:table-cell>
          <table:table-cell office:value-type="float" office:value="372.349693751735" calcext:value-type="float">
            <text:p>372.34969375173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411.212851248204" calcext:value-type="float">
            <text:p>411.212851248204</text:p>
          </table:table-cell>
          <table:table-cell office:value-type="float" office:value="417.697711241573" calcext:value-type="float">
            <text:p>417.697711241573</text:p>
          </table:table-cell>
          <table:table-cell office:value-type="float" office:value="452.760818938771" calcext:value-type="float">
            <text:p>452.76081893877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377.638239434614" calcext:value-type="float">
            <text:p>377.638239434614</text:p>
          </table:table-cell>
          <table:table-cell office:value-type="float" office:value="377.294781616954" calcext:value-type="float">
            <text:p>377.294781616954</text:p>
          </table:table-cell>
          <table:table-cell office:value-type="float" office:value="372.349693751735" calcext:value-type="float">
            <text:p>372.34969375173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11.212851248204" calcext:value-type="float">
            <text:p>411.212851248204</text:p>
          </table:table-cell>
          <table:table-cell office:value-type="float" office:value="417.697711241573" calcext:value-type="float">
            <text:p>417.697711241573</text:p>
          </table:table-cell>
          <table:table-cell office:value-type="float" office:value="452.760818938771" calcext:value-type="float">
            <text:p>452.7608189387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77.638239434614" calcext:value-type="float">
            <text:p>377.638239434614</text:p>
          </table:table-cell>
          <table:table-cell office:value-type="float" office:value="377.294781616954" calcext:value-type="float">
            <text:p>377.294781616954</text:p>
          </table:table-cell>
          <table:table-cell office:value-type="float" office:value="372.349693751735" calcext:value-type="float">
            <text:p>372.349693751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1:53:11.632368000</meta:creation-date>
    <dc:date>2026-02-18T13:13:15.542151000</dc:date>
    <meta:editing-duration>PT41M45S</meta:editing-duration>
    <meta:editing-cycles>15</meta:editing-cycles>
    <meta:generator>LibreOffice/25.8.4.2$MacOSX_X86_64 LibreOffice_project/290daaa01b999472f0c7a3890eb6a550fd74c6df</meta:generator>
    <meta:document-statistic meta:table-count="4" meta:cell-count="1100" meta:object-count="0"/>
  </office:meta>
</office:document-meta>
</file>